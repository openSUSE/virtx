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4D3000003EF353AFC5D93BE7848.png" manifest:media-type="image/png"/>
  <manifest:file-entry manifest:full-path="Pictures/100000010000025600000097D62DC26E35B304DB.png" manifest:media-type="image/png"/>
  <manifest:file-entry manifest:full-path="Pictures/10000001000003650000007E8E7E709B319833E1.png" manifest:media-type="image/png"/>
  <manifest:file-entry manifest:full-path="Pictures/10006B9C00005AC400000D2112E149964AD4B1FF.emf" manifest:media-type="image/x-emf"/>
  <manifest:file-entry manifest:full-path="Pictures/100000010000008B0000007EA7ADAEDC4B61CF50.png" manifest:media-type="image/png"/>
  <manifest:file-entry manifest:full-path="Pictures/10001A7400000E7B00000D219A7DDC5492F216A4.emf" manifest:media-type="image/x-emf"/>
  <manifest:file-entry manifest:full-path="Pictures/10000001000002580000025835CE93B60840B86D.png" manifest:media-type="image/png"/>
  <manifest:file-entry manifest:full-path="Pictures/10000001000007D2000002DBAB5BFA7CBD1961C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/>
    <style:font-face style:name="Roboto" svg:font-family="Roboto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Times New Roman" svg:font-family="'Times New Roman'" style:font-pitch="variable"/>
    <style:font-face style:name="Times New Roman1" svg:font-family="'Times New Roman'"/>
    <style:font-face style:name="Work Sans Light" svg:font-family="'Work Sans Light'" style:font-pitch="variable"/>
    <style:font-face style:name="Work Sans Light1" svg:font-family="'Work Sans Light'"/>
    <style:font-face style:name="Work Sans Medium" svg:font-family="'Work Sans Medium'" style:font-pitch="variable"/>
    <style:font-face style:name="Work Sans Medium1" svg:font-family="'Work Sans Medium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cm" svg:stroke-color="#3465a4" draw:fill="none" loext:fill-use-slide-background="false" draw:textarea-horizontal-align="justify" draw:textarea-vertical-align="middle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5" style:family="graphic" style:parent-style-name="standard">
      <style:graphic-properties draw:stroke="solid" svg:stroke-width="0cm" svg:stroke-color="#fe7c3f" draw:fill="none" loext:fill-use-slide-background="false" draw:textarea-horizontal-align="justify" draw:textarea-vertical-align="middle" draw:auto-grow-height="false" draw:fit-to-size="false" style:shrink-to-fit="false" fo:min-height="7.383cm" fo:min-width="8.48cm" fo:padding-top="0.125cm" fo:padding-bottom="0.125cm" fo:padding-left="0.25cm" fo:padding-right="0.25cm" fo:wrap-option="wrap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standard" style:list-style-name="L3">
      <style:graphic-properties draw:stroke="solid" svg:stroke-width="0cm" svg:stroke-color="#3465a4" draw:fill="solid" draw:fill-color="#30ba78" draw:textarea-horizontal-align="justify" draw:textarea-vertical-align="middle" draw:auto-grow-height="false" draw:fit-to-size="false" style:shrink-to-fit="false" fo:min-height="1.008cm" fo:min-width="2.0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solid" svg:stroke-width="0cm" svg:stroke-color="#3465a4" draw:fill="solid" draw:fill-color="#f2f2f2" draw:textarea-horizontal-align="justify" draw:textarea-vertical-align="middle" draw:auto-grow-height="false" draw:fit-to-size="false" style:shrink-to-fit="false" fo:min-height="0.373cm" fo:min-width="2.03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cm" svg:stroke-color="#3465a4" draw:fill="solid" draw:fill-color="#30ba78" draw:textarea-horizontal-align="justify" draw:textarea-vertical-align="middle" draw:auto-grow-height="false" draw:fit-to-size="false" style:shrink-to-fit="false" fo:min-height="1.008cm" fo:min-width="2.0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cm" svg:stroke-color="#3465a4" draw:fill="solid" draw:fill-color="#f2f2f2" draw:textarea-horizontal-align="justify" draw:textarea-vertical-align="middle" draw:auto-grow-height="false" draw:fit-to-size="false" style:shrink-to-fit="false" fo:min-height="0.373cm" fo:min-width="2.03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cm" svg:stroke-color="#3465a4" draw:fill="solid" draw:fill-color="#30ba78" draw:textarea-horizontal-align="justify" draw:textarea-vertical-align="middle" draw:auto-grow-height="false" draw:fit-to-size="false" style:shrink-to-fit="false" fo:min-height="1.008cm" fo:min-width="2.0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solid" svg:stroke-width="0cm" svg:stroke-color="#3465a4" draw:fill="solid" draw:fill-color="#f2f2f2" draw:textarea-horizontal-align="justify" draw:textarea-vertical-align="middle" draw:auto-grow-height="false" draw:fit-to-size="false" style:shrink-to-fit="false" fo:min-height="0.373cm" fo:min-width="2.03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solid" svg:stroke-width="0cm" svg:stroke-color="#3465a4" draw:fill="solid" draw:fill-color="#30ba78" draw:textarea-horizontal-align="justify" draw:textarea-vertical-align="middle" draw:auto-grow-height="false" draw:fit-to-size="false" style:shrink-to-fit="false" fo:min-height="1.008cm" fo:min-width="2.0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solid" svg:stroke-width="0cm" svg:stroke-color="#3465a4" draw:fill="solid" draw:fill-color="#f2f2f2" draw:textarea-horizontal-align="justify" draw:textarea-vertical-align="middle" draw:auto-grow-height="false" draw:fit-to-size="false" style:shrink-to-fit="false" fo:min-height="0.373cm" fo:min-width="2.03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solid" svg:stroke-width="0cm" svg:stroke-color="#3465a4" draw:fill="solid" draw:fill-color="#30ba78" draw:textarea-horizontal-align="justify" draw:textarea-vertical-align="middle" draw:auto-grow-height="false" draw:fit-to-size="false" style:shrink-to-fit="false" fo:min-height="1.008cm" fo:min-width="2.0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solid" svg:stroke-width="0cm" svg:stroke-color="#3465a4" draw:fill="solid" draw:fill-color="#f2f2f2" draw:textarea-horizontal-align="justify" draw:textarea-vertical-align="middle" draw:auto-grow-height="false" draw:fit-to-size="false" style:shrink-to-fit="false" fo:min-height="0.373cm" fo:min-width="2.03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cm" svg:stroke-color="#3465a4" draw:fill="solid" draw:fill-color="#30ba78" draw:textarea-horizontal-align="justify" draw:textarea-vertical-align="middle" draw:auto-grow-height="false" draw:fit-to-size="false" style:shrink-to-fit="false" fo:min-height="1.008cm" fo:min-width="2.0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3">
      <style:graphic-properties draw:stroke="solid" svg:stroke-width="0cm" svg:stroke-color="#3465a4" draw:fill="solid" draw:fill-color="#f2f2f2" draw:textarea-horizontal-align="justify" draw:textarea-vertical-align="middle" draw:auto-grow-height="false" draw:fit-to-size="false" style:shrink-to-fit="false" fo:min-height="0.373cm" fo:min-width="2.03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3">
      <style:graphic-properties draw:stroke="solid" svg:stroke-width="0cm" svg:stroke-color="#3465a4" draw:fill="solid" draw:fill-color="#90ebcd" draw:textarea-horizontal-align="justify" draw:textarea-vertical-align="middle" draw:auto-grow-height="false" draw:fit-to-size="false" style:shrink-to-fit="false" fo:min-height="1.008cm" fo:min-width="2.0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 style:list-style-name="L4">
      <style:graphic-properties draw:stroke="solid" svg:stroke-width="0.026cm" svg:stroke-color="#3465a4" draw:stroke-linejoin="round" draw:fill="solid" draw:fill-color="#729fcf" draw:textarea-horizontal-align="justify" draw:textarea-vertical-align="middle" draw:auto-grow-height="false" draw:fit-to-size="false" style:shrink-to-fit="false" fo:min-height="1.734cm" fo:min-width="5.21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width="0cm" svg:stroke-color="#3465a4" draw:marker-end="msArrowEnd_20_5" draw:marker-end-width="0.21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3" style:family="graphic" style:parent-style-name="standard">
      <style:graphic-properties loext:decorative="false"/>
    </style:style>
    <style:style style:name="gr24" style:family="graphic" style:parent-style-name="standard">
      <style:graphic-properties draw:stroke="solid" svg:stroke-width="0cm" svg:stroke-color="#ff0000" draw:marker-end="msArrowEnd_20_5" draw:marker-end-width="0.21cm" draw:marker-end-center="false" draw:fill="none" loext:fill-use-slide-background="false" draw:textarea-horizontal-align="justify" draw:textarea-vertical-align="middle" draw:auto-grow-height="false" draw:fit-to-size="false" style:shrink-to-fit="false" fo:padding-top="-0.125cm" fo:padding-bottom="-0.125cm" fo:padding-left="0.25cm" fo:padding-right="0.25cm" fo:wrap-option="wrap" loext:decorative="false"/>
    </style:style>
    <style:style style:name="gr25" style:family="graphic" style:parent-style-name="standard" style:list-style-name="L3">
      <style:graphic-properties draw:stroke="solid" svg:stroke-width="0cm" svg:stroke-color="#3465a4" draw:fill="solid" draw:fill-color="#f2f2f2" draw:textarea-horizontal-align="justify" draw:textarea-vertical-align="middle" draw:auto-grow-height="false" draw:fit-to-size="false" style:shrink-to-fit="false" fo:min-height="0.373cm" fo:min-width="0.76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3">
      <style:graphic-properties draw:stroke="solid" svg:stroke-width="0cm" svg:stroke-color="#3465a4" draw:fill="solid" draw:fill-color="#f2f2f2" draw:textarea-horizontal-align="justify" draw:textarea-vertical-align="middle" draw:auto-grow-height="false" draw:fit-to-size="false" style:shrink-to-fit="false" fo:min-height="0.373cm" fo:min-width="0.76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3">
      <style:graphic-properties draw:stroke="solid" svg:stroke-width="0cm" svg:stroke-color="#3465a4" draw:fill="solid" draw:fill-color="#f2f2f2" draw:textarea-horizontal-align="justify" draw:textarea-vertical-align="middle" draw:auto-grow-height="false" draw:fit-to-size="false" style:shrink-to-fit="false" fo:min-height="0.373cm" fo:min-width="0.76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solid" svg:stroke-width="0cm" svg:stroke-color="#3465a4" draw:fill="solid" draw:fill-color="#f2f2f2" draw:textarea-horizontal-align="justify" draw:textarea-vertical-align="middle" draw:auto-grow-height="false" draw:fit-to-size="false" style:shrink-to-fit="false" fo:min-height="0.373cm" fo:min-width="0.76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solid" svg:stroke-width="0cm" svg:stroke-color="#3465a4" draw:fill="solid" draw:fill-color="#f2f2f2" draw:textarea-horizontal-align="justify" draw:textarea-vertical-align="middle" draw:auto-grow-height="false" draw:fit-to-size="false" style:shrink-to-fit="false" fo:min-height="0.373cm" fo:min-width="0.76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solid" svg:stroke-width="0cm" svg:stroke-color="#3465a4" draw:fill="solid" draw:fill-color="#f2f2f2" draw:textarea-horizontal-align="justify" draw:textarea-vertical-align="middle" draw:auto-grow-height="false" draw:fit-to-size="false" style:shrink-to-fit="false" fo:min-height="0.373cm" fo:min-width="0.76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19cm" fo:min-width="2.0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19cm" fo:min-width="2.0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19cm" fo:min-width="2.0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19cm" fo:min-width="2.0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52cm" fo:min-width="21.28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cm" svg:stroke-color="#3465a4" draw:marker-start="msArrowEnd_20_5" draw:marker-start-width="0.21cm" draw:marker-start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37" style:family="graphic" style:parent-style-name="standard" style:list-style-name="L3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6">
      <style:graphic-properties draw:stroke="solid" svg:stroke-width="0cm" svg:stroke-color="#3465a4" draw:fill="solid" draw:fill-color="#ff8e7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solid" svg:stroke-width="0cm" svg:stroke-color="#3465a4" draw:fill="solid" draw:fill-color="#f2f2f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solid" svg:stroke-width="0cm" svg:stroke-color="#3465a4" draw:fill="solid" draw:fill-color="#f2f2f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solid" svg:stroke-width="0cm" svg:stroke-color="#3465a4" draw:fill="solid" draw:fill-color="#f2f2f2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solid" svg:stroke-width="0cm" svg:stroke-color="#3465a4" draw:fill="solid" draw:fill-color="#f2f2f2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3">
      <style:graphic-properties draw:stroke="solid" svg:stroke-width="0cm" svg:stroke-color="#3465a4" draw:fill="solid" draw:fill-color="#f2f2f2" draw:textarea-horizontal-align="justify" draw:textarea-vertical-align="middle" draw:auto-grow-height="false" draw:fit-to-size="false" style:shrink-to-fit="false" fo:min-height="0.377cm" fo:min-width="5.93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solid" svg:stroke-width="0cm" svg:stroke-color="#3465a4" draw:fill="solid" draw:fill-color="#f2f2f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solid" svg:stroke-width="0cm" svg:stroke-color="#3465a4" draw:fill="solid" draw:fill-color="#f2f2f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solid" svg:stroke-width="0cm" svg:stroke-color="#3465a4" draw:fill="solid" draw:fill-color="#f2f2f2" draw:textarea-horizontal-align="justify" draw:textarea-vertical-align="middle" draw:auto-grow-height="false" draw:fit-to-size="false" style:shrink-to-fit="false" fo:min-height="0.706cm" fo:min-width="7.02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solid" svg:stroke-width="0cm" svg:stroke-color="#3465a4" draw:fill="solid" draw:fill-color="#f2f2f2" draw:textarea-horizontal-align="justify" draw:textarea-vertical-align="middle" draw:auto-grow-height="false" draw:fit-to-size="false" style:shrink-to-fit="false" fo:min-height="0.706cm" fo:min-width="5.84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solid" svg:stroke-width="0cm" svg:stroke-color="#3465a4" draw:fill="solid" draw:fill-color="#f2f2f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>
      <style:graphic-properties draw:stroke="solid" svg:stroke-width="0cm" svg:stroke-color="#3465a4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50" style:family="graphic" style:parent-style-name="standard">
      <style:graphic-properties draw:stroke="solid" svg:stroke-width="0cm" svg:stroke-color="#3465a4" draw:marker-start="msArrowEnd_20_5" draw:marker-start-width="0.21cm" draw:marker-start-center="false" draw:marker-end="msArrowEnd_20_5" draw:marker-end-width="0.21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1" style:family="graphic" style:parent-style-name="standard" style:list-style-name="L3">
      <style:graphic-properties draw:stroke="solid" svg:stroke-width="0cm" svg:stroke-color="#3465a4" draw:fill="solid" draw:fill-color="#f2f2f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solid" svg:stroke-width="0cm" svg:stroke-color="#3465a4" draw:marker-start="msArrowEnd_20_5" draw:marker-start-width="0.21cm" draw:marker-start-center="false" draw:marker-end="msArrowEnd_20_5" draw:marker-end-width="0.21cm" draw:marker-end-center="false" draw:fill="none" loext:fill-use-slide-background="false" draw:textarea-horizontal-align="justify" draw:textarea-vertical-align="middle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53" style:family="graphic" style:parent-style-name="standard">
      <style:graphic-properties draw:stroke="solid" svg:stroke-width="0cm" svg:stroke-color="#3465a4" draw:marker-end="msArrowEnd_20_5" draw:marker-end-width="0.21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style:writing-mode="lr-tb"/>
    </style:style>
    <style:style style:name="gr54" style:family="graphic" style:parent-style-name="standard">
      <style:graphic-properties draw:stroke="solid" svg:stroke-width="0cm" svg:stroke-color="#fe7c3f" draw:marker-start="msArrowEnd_20_5" draw:marker-start-width="0.21cm" draw:marker-start-center="false" draw:marker-end="msArrowEnd_20_5" draw:marker-end-width="0.21cm" draw:marker-end-center="false" draw:fill="none" loext:fill-use-slide-background="false" draw:textarea-horizontal-align="justify" draw:textarea-vertical-align="middle" draw:auto-grow-height="false" draw:fit-to-size="false" style:shrink-to-fit="false" fo:padding-top="-0.125cm" fo:padding-bottom="-0.125cm" fo:padding-left="0.25cm" fo:padding-right="0.25cm" fo:wrap-option="wrap" loext:decorative="false"/>
      <style:paragraph-properties style:writing-mode="lr-tb"/>
    </style:style>
    <style:style style:name="gr55" style:family="graphic" style:parent-style-name="standard">
      <style:graphic-properties draw:stroke="solid" svg:stroke-width="0cm" svg:stroke-color="#fe7c3f" draw:marker-start="msArrowEnd_20_5" draw:marker-start-width="0.21cm" draw:marker-start-center="false" draw:marker-end="msArrowEnd_20_5" draw:marker-end-width="0.21cm" draw:marker-end-center="false" draw:fill="none" loext:fill-use-slide-background="false" draw:textarea-horizontal-align="justify" draw:textarea-vertical-align="middle" draw:auto-grow-height="false" draw:fit-to-size="false" style:shrink-to-fit="false" fo:padding-top="-0.125cm" fo:padding-bottom="-0.125cm" fo:padding-left="0.25cm" fo:padding-right="0.25cm" fo:wrap-option="wrap" loext:decorative="false"/>
    </style:style>
    <style:style style:name="gr56" style:family="graphic" style:parent-style-name="standard">
      <style:graphic-properties draw:stroke="solid" svg:stroke-width="0cm" svg:stroke-color="#3465a4" draw:marker-start="msArrowEnd_20_5" draw:marker-start-width="0.21cm" draw:marker-start-center="false" draw:marker-end="msArrowEnd_20_5" draw:marker-end-width="0.21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57" style:family="graphic" style:parent-style-name="standard" style:list-style-name="L3">
      <style:graphic-properties draw:stroke="solid" svg:stroke-width="0cm" svg:stroke-color="#3465a4" draw:fill="solid" draw:fill-color="#30ba78" draw:textarea-horizontal-align="justify" draw:textarea-vertical-align="middle" draw:auto-grow-height="false" draw:fit-to-size="false" style:shrink-to-fit="false" fo:min-height="1.02cm" fo:min-width="2.0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solid" svg:stroke-width="0cm" svg:stroke-color="#3465a4" draw:fill="solid" draw:fill-color="#30ba78" draw:textarea-horizontal-align="justify" draw:textarea-vertical-align="middle" draw:auto-grow-height="false" draw:fit-to-size="false" style:shrink-to-fit="false" fo:min-height="1.02cm" fo:min-width="2.36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solid" svg:stroke-width="0cm" svg:stroke-color="#3465a4" draw:fill="solid" draw:fill-color="#30ba78" draw:textarea-horizontal-align="justify" draw:textarea-vertical-align="middle" draw:auto-grow-height="false" draw:fit-to-size="false" style:shrink-to-fit="false" fo:min-height="1.02cm" fo:min-width="2.05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solid" svg:stroke-width="0cm" svg:stroke-color="#3465a4" draw:fill="solid" draw:fill-color="#30ba78" draw:textarea-horizontal-align="justify" draw:textarea-vertical-align="middle" draw:auto-grow-height="false" draw:fit-to-size="false" style:shrink-to-fit="false" fo:min-height="1.02cm" fo:min-width="2.98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solid" svg:stroke-width="0cm" svg:stroke-color="#3465a4" draw:fill="solid" draw:fill-color="#30ba78" draw:textarea-horizontal-align="justify" draw:textarea-vertical-align="middle" draw:auto-grow-height="false" draw:fit-to-size="false" style:shrink-to-fit="false" fo:min-height="1.02cm" fo:min-width="2.36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solid" svg:stroke-width="0cm" svg:stroke-color="#3465a4" draw:fill="solid" draw:fill-color="#30ba78" draw:textarea-horizontal-align="justify" draw:textarea-vertical-align="middle" draw:auto-grow-height="false" draw:fit-to-size="false" style:shrink-to-fit="false" fo:min-height="1.02cm" fo:min-width="2.98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3" style:family="graphic" style:parent-style-name="standard" style:list-style-name="L3">
      <style:graphic-properties draw:stroke="solid" svg:stroke-width="0cm" svg:stroke-color="#3465a4" draw:fill="solid" draw:fill-color="#30ba78" draw:textarea-horizontal-align="justify" draw:textarea-vertical-align="middle" draw:auto-grow-height="false" draw:fit-to-size="false" style:shrink-to-fit="false" fo:min-height="0.385cm" fo:min-width="2.03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solid" svg:stroke-width="0cm" svg:stroke-color="#3465a4" draw:fill="solid" draw:fill-color="#f2f2f2" draw:textarea-horizontal-align="justify" draw:textarea-vertical-align="middle" draw:auto-grow-height="false" draw:fit-to-size="false" style:shrink-to-fit="false" fo:min-height="0.373cm" fo:min-width="2.0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5" style:family="graphic" style:parent-style-name="standard" style:list-style-name="L3">
      <style:graphic-properties draw:stroke="dash" draw:stroke-dash="Long_20_Dot" svg:stroke-width="0cm" svg:stroke-color="#3465a4" draw:fill="solid" draw:fill-color="#f2f2f2" draw:textarea-horizontal-align="justify" draw:textarea-vertical-align="middle" draw:auto-grow-height="false" draw:fit-to-size="false" style:shrink-to-fit="false" fo:min-height="0.386cm" fo:min-width="3.30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6" style:family="graphic" style:parent-style-name="standard" style:list-style-name="L3">
      <style:graphic-properties draw:stroke="dash" draw:stroke-dash="Long_20_Dot" svg:stroke-width="0cm" svg:stroke-color="#3465a4" draw:fill="solid" draw:fill-color="#f2f2f2" draw:textarea-horizontal-align="justify" draw:textarea-vertical-align="middle" draw:auto-grow-height="false" draw:fit-to-size="false" style:shrink-to-fit="false" fo:min-height="0.386cm" fo:min-width="3.30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52cm" fo:min-width="21.28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6.159cm" fo:min-width="20.58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52cm" fo:min-width="21.28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6.159cm" fo:min-width="20.58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52cm" fo:min-width="21.28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6.159cm" fo:min-width="20.58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52cm" fo:min-width="21.28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52cm" fo:min-width="21.28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52cm" fo:min-width="21.28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52cm" fo:min-width="21.28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52cm" fo:min-width="21.28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52cm" fo:min-width="21.28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52cm" fo:min-width="21.28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52cm" fo:min-width="21.28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52cm" fo:min-width="21.28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52cm" fo:min-width="21.28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Default_20_1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8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Default_20_1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8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Default_20_1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8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Default_20_1_5f_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224cm" style:use-optimal-column-width="false"/>
    </style:style>
    <style:style style:name="ro1" style:family="table-row">
      <style:table-row-properties style:row-height="0.755cm" style:use-optimal-row-height="false"/>
    </style:style>
    <style:style style:name="ro2" style:family="table-row">
      <style:table-row-properties style:row-height="0.621cm" style:use-optimal-row-height="false"/>
    </style:style>
    <style:style style:name="ro3" style:family="table-row">
      <style:table-row-properties style:row-height="0.757cm" style:use-optimal-row-height="false"/>
    </style:style>
    <style:style style:name="ce1" style:family="table-cell">
      <loext:graphic-properties draw:fill="none" loext:fill-use-slide-background="false" draw:textarea-vertical-align="top" fo:padding-top="0.127cm" fo:padding-bottom="0.127cm" fo:padding-left="0.1cm" fo:padding-right="0.1cm"/>
      <style:paragraph-properties fo:border="0.28pt solid #000000"/>
    </style:style>
    <style:style style:name="P1" style:family="paragraph">
      <style:paragraph-properties fo:margin-left="0cm" fo:margin-right="0cm" fo:margin-top="0cm" fo:margin-bottom="0.203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8" style:family="paragraph">
      <loext:graphic-properties draw:fill="solid" draw:fill-color="#30ba78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9" style:family="paragraph">
      <loext:graphic-properties draw:fill="solid" draw:fill-color="#f2f2f2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10" style:family="paragraph">
      <loext:graphic-properties draw:fill="solid" draw:fill-color="#90ebcd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9" style:family="paragraph">
      <loext:graphic-properties draw:fill="solid" draw:fill-color="#729fc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20" style:family="paragraph">
      <loext:graphic-properties draw:fill="solid" draw:fill-color="#ff8e77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21" style:family="paragraph">
      <loext:graphic-properties draw:fill="solid" draw:fill-color="#f2f2f2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color="#729fcf" loext:opacity="100%" fo:font-size="10pt" fo:text-shadow="1pt 1pt" style:font-size-asian="10pt" style:font-size-complex="10pt"/>
    </style:style>
    <style:style style:name="P24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fo:color="#729fcf" loext:opacity="100%" fo:font-size="12pt" fo:text-shadow="1pt 1pt" style:font-size-asian="12pt" style:font-size-complex="12pt"/>
    </style:style>
    <style:style style:name="P26" style:family="paragraph">
      <loext:graphic-properties draw:fill="solid" draw:fill-color="#f2f2f2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729fcf" loext:opacity="100%" fo:font-size="12pt" fo:text-shadow="1pt 1pt" style:font-size-asian="12pt" style:font-size-complex="12pt"/>
    </style:style>
    <style:style style:name="P27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28" style:family="paragraph">
      <loext:graphic-properties draw:fill="solid" draw:fill-color="#f2f2f2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2pt" style:font-size-asian="12pt" style:font-size-complex="12pt"/>
    </style:style>
    <style:style style:name="P29" style:family="paragraph">
      <style:paragraph-properties fo:margin-left="0cm" fo:margin-right="0cm" fo:margin-top="0cm" fo:margin-bottom="0.203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30" style:family="paragraph">
      <loext:graphic-properties draw:fill="none"/>
      <style:paragraph-properties fo:margin-left="0cm" fo:margin-right="0cm" fo:margin-top="0cm" fo:margin-bottom="0.203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1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Work Sans Light1" fo:font-size="16pt" fo:letter-spacing="normal" fo:language="en" fo:country="US" fo:font-style="normal" style:text-underline-style="none" fo:font-weight="normal" fo:background-color="transparent" style:font-name-asian="Work Sans Medium1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Work Sans Light1" fo:font-size="16pt" fo:letter-spacing="normal" fo:language="en" fo:country="US" fo:font-style="normal" style:text-underline-style="none" fo:font-weight="normal" fo:background-color="transparent" style:font-name-asian="Work Sans Medium1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Work Sans Medium1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30ba78" loext:opacity="100%" style:text-outline="false" style:text-line-through-style="none" style:text-line-through-type="none" style:text-position="0% 100%" style:font-name="Work Sans Medium1" fo:font-size="18pt" fo:letter-spacing="normal" fo:language="en" fo:country="US" fo:font-style="normal" style:text-underline-style="none" fo:font-weight="normal" fo:background-color="transparent" style:font-name-asian="Work Sans Medium1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variant="normal" fo:text-transform="none" fo:color="#f2f2f2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fo:background-color="transparent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fo:font-variant="normal" fo:text-transform="none" fo:color="#fe7c3f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Work Sans Light1" fo:font-size="15pt" fo:letter-spacing="normal" fo:language="en" fo:country="US" fo:font-style="normal" fo:text-shadow="none" style:text-underline-style="none" fo:font-weight="bold" style:letter-kerning="true" fo:background-color="transparent" style:font-name-asian="Work Sans Medium1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Work Sans Light1" fo:font-size="15pt" fo:letter-spacing="normal" fo:language="en" fo:country="US" fo:font-style="normal" fo:text-shadow="none" style:text-underline-style="none" fo:font-weight="normal" style:letter-kerning="true" fo:background-color="transparent" style:font-name-asian="Work Sans Medium1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Work Sans Light1" fo:font-size="15pt" fo:letter-spacing="normal" fo:language="en" fo:country="US" fo:font-style="normal" fo:text-shadow="none" style:text-underline-style="none" fo:font-weight="normal" style:letter-kerning="true" fo:background-color="transparent" style:font-name-asian="Work Sans Medium1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Work Sans Light1" fo:font-size="15pt" fo:letter-spacing="normal" fo:language="en" fo:country="US" fo:font-style="normal" style:text-underline-style="none" fo:font-weight="bold" fo:background-color="transparent" style:font-name-asian="Work Sans Medium1" style:font-size-asian="15pt" style:font-style-asian="normal" style:font-weight-asian="bold" style:font-size-complex="15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Work Sans Light1" fo:font-size="15pt" fo:letter-spacing="normal" fo:language="en" fo:country="US" fo:font-style="normal" style:text-underline-style="none" fo:font-weight="normal" fo:background-color="transparent" style:font-name-asian="Work Sans Medium1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Work Sans Light1" fo:font-size="15pt" fo:letter-spacing="normal" fo:language="en" fo:country="US" fo:font-style="normal" style:text-underline-style="none" fo:font-weight="normal" fo:background-color="transparent" style:font-name-asian="Work Sans Medium1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Work Sans Light1" fo:font-size="15pt" fo:letter-spacing="normal" fo:language="en" fo:country="US" fo:font-style="normal" style:text-underline-style="none" fo:font-weight="bold" fo:background-color="transparent" style:font-name-asian="Work Sans Medium1" style:font-size-asian="15pt" style:font-style-asian="normal" style:font-weight-asian="bold" style:font-size-complex="15pt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Noto Sans CJK SC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5pt" fo:letter-spacing="normal" fo:language="en" fo:country="US" fo:font-style="normal" style:text-underline-style="none" fo:font-weight="normal" fo:background-color="transparent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23" style:family="text">
      <style:text-properties fo:color="#729fcf" loext:opacity="100%" fo:font-size="10pt" fo:text-shadow="1pt 1pt" style:font-size-asian="10pt" style:font-size-complex="10pt"/>
    </style:style>
    <style:style style:name="T24" style:family="text">
      <style:text-properties fo:font-variant="normal" fo:text-transform="none" fo:color="#fe7c3f" loext:opacity="100%" style:text-outline="false" style:text-line-through-style="none" style:text-line-through-type="none" style:text-position="0% 100%" style:font-name="Arial1" fo:font-size="12pt" fo:letter-spacing="normal" fo:language="en" fo:country="US" fo:font-style="normal" fo:text-shadow="1pt 1pt" style:text-underline-style="none" fo:font-weight="normal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25" style:family="text">
      <style:text-properties fo:font-variant="normal" fo:text-transform="none" fo:color="#729fcf" loext:opacity="100%" style:text-outline="false" style:text-line-through-style="none" style:text-line-through-type="none" style:text-position="0% 100%" style:font-name="Arial1" fo:font-size="12pt" fo:letter-spacing="normal" fo:language="en" fo:country="US" fo:font-style="normal" fo:text-shadow="1pt 1pt" style:text-underline-style="none" fo:font-weight="normal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26" style:family="text">
      <style:text-properties fo:color="#729fcf" loext:opacity="100%" style:font-name="Arial1" fo:font-size="12pt" fo:language="en" fo:country="US" fo:text-shadow="1pt 1pt" style:font-name-asian="DejaVu Sans2" style:font-size-asian="12pt" style:font-name-complex="DejaVu Sans2" style:font-size-complex="12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Work Sans Light1" fo:font-size="14pt" fo:letter-spacing="normal" fo:language="en" fo:country="US" fo:font-style="normal" fo:text-shadow="none" style:text-underline-style="none" fo:font-weight="normal" style:letter-kerning="true" fo:background-color="transparent" style:font-name-asian="Work Sans Medium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1" fo:font-size="10pt" fo:letter-spacing="normal" fo:language="en" fo:country="US" fo:font-style="normal" fo:text-shadow="none" style:text-underline-style="none" fo:font-weight="normal" style:letter-kerning="true" fo:background-color="transparent" style:font-name-asian="Work Sans Medium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Mono1" fo:font-size="10pt" fo:letter-spacing="normal" fo:language="en" fo:country="US" fo:font-style="normal" fo:text-shadow="none" style:text-underline-style="none" fo:font-weight="normal" style:letter-kerning="true" fo:background-color="transparent" style:font-name-asian="Work Sans Medium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Work Sans Light1" fo:font-size="14pt" fo:letter-spacing="normal" fo:language="en" fo:country="US" fo:font-style="normal" fo:text-shadow="none" style:text-underline-style="none" fo:font-weight="normal" style:letter-kerning="true" fo:background-color="transparent" style:font-name-asian="Work Sans Medium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Work Sans Light1" fo:font-size="14pt" fo:letter-spacing="normal" fo:language="en" fo:country="US" fo:font-style="normal" fo:text-shadow="none" style:text-underline-style="none" fo:font-weight="normal" style:letter-kerning="true" fo:background-color="transparent" style:font-name-asian="Work Sans Medium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Work Sans Light1" fo:font-size="14pt" fo:letter-spacing="normal" fo:language="en" fo:country="US" fo:font-style="normal" fo:text-shadow="none" style:text-underline-style="none" fo:font-weight="bold" style:letter-kerning="true" fo:background-color="transparent" style:font-name-asian="Work Sans Medium1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Work Sans Light1" fo:font-size="14pt" fo:letter-spacing="normal" fo:language="en" fo:country="US" fo:text-shadow="none" style:text-underline-style="none" fo:font-weight="normal" style:letter-kerning="true" fo:background-color="transparent" style:font-name-asian="Work Sans Medium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Work Sans Light1" fo:font-size="14pt" fo:letter-spacing="normal" fo:language="en" fo:country="US" fo:font-style="normal" fo:text-shadow="none" style:text-underline-style="none" fo:font-weight="bold" style:letter-kerning="true" fo:background-color="transparent" style:font-name-asian="Work Sans Medium1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Work Sans Light1" fo:font-size="14pt" fo:letter-spacing="normal" fo:language="en" fo:country="US" fo:font-style="normal" fo:text-shadow="none" style:text-underline-style="solid" style:text-underline-width="auto" style:text-underline-color="font-color" fo:font-weight="normal" style:letter-kerning="true" fo:background-color="transparent" style:font-name-asian="Work Sans Medium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ee" loext:opacity="100%" style:text-outline="false" style:text-line-through-style="none" style:text-line-through-type="none" style:text-position="0% 100%" style:font-name="Work Sans Light1" fo:font-size="14pt" fo:letter-spacing="normal" fo:language="en" fo:country="US" fo:font-style="normal" fo:text-shadow="none" style:text-underline-style="solid" style:text-underline-width="auto" style:text-underline-color="font-color" fo:font-weight="normal" style:letter-kerning="true" fo:background-color="transparent" style:font-name-asian="Work Sans Medium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Work Sans Light1" fo:font-size="14pt" fo:letter-spacing="normal" fo:language="en" fo:country="US" fo:font-style="normal" style:text-underline-style="none" fo:font-weight="normal" fo:background-color="transparent" style:font-name-asian="Work Sans Medium1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Work Sans Light1" fo:font-size="14pt" fo:letter-spacing="normal" fo:language="en" fo:country="US" fo:font-style="normal" style:text-underline-style="none" fo:font-weight="normal" fo:background-color="transparent" style:font-name-asian="Work Sans Medium1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Work Sans Medium1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30ba7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f2f2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e7c3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- mainly Linux guests (but consider Windows)&#10;&#10;- support large s" draw:style-name="dp1" draw:master-page-name="Default_20_1">
        <office:forms form:automatic-focus="false" form:apply-design-mode="false"/>
        <draw:frame draw:name="PlaceHolder 1" presentation:style-name="pr1" draw:text-style-name="P2" draw:layer="layout" svg:width="20.586cm" svg:height="6.158cm" svg:x="1.4cm" svg:y="2.095cm" presentation:class="title" presentation:user-transformed="true">
          <draw:text-box>
            <text:p text:style-name="P1"><text:span text:style-name="T1">- mainly </text:span><text:span text:style-name="T1">Linux </text:span><text:span text:style-name="T1">guests </text:span><text:span text:style-name="T1">(but </text:span><text:span text:style-name="T1">consider </text:span><text:span text:style-name="T1">Windows</text:span><text:span text:style-name="T1">)</text:span><text:span text:style-name="T2"><text:line-break/></text:span><text:span text:style-name="T2"><text:line-break/></text:span><text:span text:style-name="T1">- support </text:span><text:span text:style-name="T1">large </text:span><text:span text:style-name="T1">servers </text:span><text:span text:style-name="T1">(x86_64), </text:span><text:span text:style-name="T1">NUMA, </text:span><text:span text:style-name="T1">large VM </text:span><text:span text:style-name="T1">memory </text:span><text:span text:style-name="T1">sizes (TB </text:span><text:span text:style-name="T1">ranges)</text:span><text:span text:style-name="T2"><text:line-break/></text:span><text:span text:style-name="T2"><text:line-break/></text:span><text:span text:style-name="T1">- both </text:span><text:span text:style-name="T1">BIOS and </text:span><text:span text:style-name="T1">UEFI </text:span><text:span text:style-name="T1">virtual </text:span><text:span text:style-name="T1">firmware, </text:span><text:span text:style-name="T1">basic VM </text:span><text:span text:style-name="T1">lifecycle, </text:span><text:span text:style-name="T1">live </text:span><text:span text:style-name="T1">migratio</text:span><text:span text:style-name="T1">n</text:span><text:span text:style-name="T2"><text:line-break/></text:span><text:span text:style-name="T2"><text:line-break/></text:span><text:span text:style-name="T1">- </text:span><text:span text:style-name="T1">hugetlbf</text:span><text:span text:style-name="T1">s for the </text:span><text:span text:style-name="T1">large </text:span><text:span text:style-name="T1">VMs</text:span><text:span text:style-name="T2"><text:line-break/></text:span><text:span text:style-name="T2"><text:line-break/></text:span><text:span text:style-name="T1">- shared </text:span><text:span text:style-name="T1">storage </text:span><text:span text:style-name="T1">only </text:span><text:span text:style-name="T1">(NFS, </text:span><text:span text:style-name="T1">iSCSI, FC, </text:span><text:span text:style-name="T1">NVMe/T</text:span><text:span text:style-name="T1">CP), no </text:span><text:span text:style-name="T1">local </text:span><text:span text:style-name="T1">storage</text:span><text:span text:style-name="T2"><text:line-break/></text:span><text:span text:style-name="T2"><text:line-break/></text:span><text:span text:style-name="T1">- </text:span><text:span text:style-name="T1">networki</text:span><text:span text:style-name="T1">ng just </text:span><text:span text:style-name="T1">consume</text:span><text:span text:style-name="T1">d as </text:span><text:span text:style-name="T1">configur</text:span><text:span text:style-name="T1">ed, vlans </text:span><text:span text:style-name="T1">to </text:span><text:span text:style-name="T1">separate </text:span><text:span text:style-name="T1">VM </text:span><text:span text:style-name="T1">groups </text:span><text:span text:style-name="T1">and </text:span><text:span text:style-name="T1">mgmt</text:span><text:span text:style-name="T2"><text:line-break/></text:span><text:span text:style-name="T2"><text:line-break/></text:span><text:span text:style-name="T1">- Offer a </text:span><text:span text:style-name="T1">REST </text:span><text:span text:style-name="T1">API, to </text:span><text:span text:style-name="T1">write </text:span><text:span text:style-name="T1">clients, </text:span><text:span text:style-name="T1">automati</text:span><text:span text:style-name="T1">on, and </text:span><text:span text:style-name="T1">custom </text:span><text:span text:style-name="T1">add-ons</text:span><text:span text:style-name="T2"><text:line-break/></text:span><text:span text:style-name="T2"><text:line-break/></text:span><text:span text:style-name="T1">- brutally </text:span><text:span text:style-name="T1">simple to </text:span><text:span text:style-name="T1">configur</text:span><text:span text:style-name="T1">e and </text:span><text:span text:style-name="T1">deploy</text:span><text:span text:style-name="T3"><text:line-break/></text:span><text:span text:style-name="T3"/></text:p>
          </draw:text-box>
        </draw:frame>
        <draw:custom-shape draw:name="PlaceHolder 9" draw:style-name="gr1" draw:text-style-name="P4" draw:layer="layout" svg:width="21.286cm" svg:height="0.951cm" svg:x="1.271cm" svg:y="0.943cm">
          <text:p text:style-name="P3"><text:span text:style-name="T4">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07cm" svg:height="10.476cm" svg:x="1.49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- federation of peers: all KVM nodes are equal, no elections, n" draw:style-name="dp1" draw:master-page-name="Default_20_1">
        <office:forms form:automatic-focus="false" form:apply-design-mode="false"/>
        <draw:frame draw:name="PlaceHolder 1" presentation:style-name="pr1" draw:text-style-name="P2" draw:layer="layout" svg:width="20.586cm" svg:height="6.158cm" svg:x="1.4cm" svg:y="2.095cm" presentation:class="title" presentation:user-transformed="true">
          <draw:text-box>
            <text:p text:style-name="P1"><text:span text:style-name="T1">- </text:span><text:span text:style-name="T1">federatio</text:span><text:span text:style-name="T1">n of </text:span><text:span text:style-name="T1">peers: all </text:span><text:span text:style-name="T1">KVM </text:span><text:span text:style-name="T1">nodes </text:span><text:span text:style-name="T1">are equal</text:span><text:span text:style-name="T2"><text:line-break/></text:span><text:span text:style-name="T2"><text:line-break/></text:span><text:span text:style-name="T1">- </text:span><text:span text:style-name="T1">inventory </text:span><text:span text:style-name="T1">service: </text:span><text:span text:style-name="T1">search </text:span><text:span text:style-name="T1">and filter </text:span><text:span text:style-name="T1">hosts </text:span><text:span text:style-name="T1">and VMs </text:span><text:span text:style-name="T1">in the </text:span><text:span text:style-name="T1">whole </text:span><text:span text:style-name="T1">cluster</text:span><text:span text:style-name="T2"><text:line-break/></text:span><text:span text:style-name="T2"><text:line-break/></text:span><text:span text:style-name="T1">- REST </text:span><text:span text:style-name="T1">API </text:span><text:span text:style-name="T1">service: </text:span><text:span text:style-name="T1">all nodes </text:span><text:span text:style-name="T1">can be </text:span><text:span text:style-name="T1">used as </text:span><text:span text:style-name="T1">VIRTX_A</text:span><text:span text:style-name="T1">PI_SERV</text:span><text:span text:style-name="T1">ER</text:span><text:span text:style-name="T2"><text:line-break/></text:span><text:span text:style-name="T2"><text:line-break/></text:span><text:span text:style-name="T1">- NUMA </text:span><text:span text:style-name="T1">pre-</text:span><text:span text:style-name="T1">placeme</text:span><text:span text:style-name="T1">nt: </text:span><text:span text:style-name="T1">simple </text:span><text:span text:style-name="T1">on/off </text:span><text:span text:style-name="T1">switch, </text:span><text:span text:style-name="T1">compatib</text:span><text:span text:style-name="T1">le with </text:span><text:span text:style-name="T1">live </text:span><text:span text:style-name="T1">migratio</text:span><text:span text:style-name="T1">n</text:span><text:span text:style-name="T2"><text:line-break/></text:span><text:span text:style-name="T2"><text:line-break/></text:span><text:span text:style-name="T1">- storage: </text:span><text:span text:style-name="T1">provision </text:span><text:span text:style-name="T1">and de-</text:span><text:span text:style-name="T1">provision </text:span><text:span text:style-name="T1">virtual </text:span><text:span text:style-name="T1">disks </text:span><text:span text:style-name="T1">and </text:span><text:span text:style-name="T1">LUNs </text:span><text:span text:style-name="T1">passed </text:span><text:span text:style-name="T1">directly </text:span><text:span text:style-name="T1">to VM</text:span><text:span text:style-name="T2"><text:line-break/></text:span><text:span text:style-name="T2"><text:line-break/></text:span><text:span text:style-name="T1">- </text:span><text:span text:style-name="T1">resource </text:span><text:span text:style-name="T1">accounti</text:span><text:span text:style-name="T1">ng: (MhZ, </text:span><text:span text:style-name="T1">MiB). </text:span><text:span text:style-name="T1">Similar to </text:span><text:span text:style-name="T1">vmware </text:span><text:span text:style-name="T1">concept.</text:span><text:span text:style-name="T2"><text:line-break/></text:span><text:span text:style-name="T2"><text:line-break/></text:span><text:span text:style-name="T3">- simple </text:span><text:span text:style-name="T3">comman</text:span><text:span text:style-name="T3">d line </text:span><text:span text:style-name="T3">client </text:span><text:span text:style-name="T3">using </text:span><text:span text:style-name="T3">API.</text:span><text:span text:style-name="T3"><text:line-break/></text:span><text:span text:style-name="T3"><text:line-break/></text:span><text:span text:style-name="T3">- basic </text:span><text:span text:style-name="T3">host </text:span><text:span text:style-name="T3">failover</text:span></text:p>
          </draw:text-box>
        </draw:frame>
        <draw:custom-shape draw:name="PlaceHolder 12" draw:style-name="gr3" draw:text-style-name="P4" draw:layer="layout" svg:width="21.286cm" svg:height="0.951cm" svg:x="1.271cm" svg:y="0.943cm">
          <text:p text:style-name="P3"><text:span text:style-name="T4">Desired 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07cm" svg:height="10.476cm" svg:x="1.49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>
        <office:forms form:automatic-focus="false" form:apply-design-mode="false"/>
        <draw:line draw:style-name="gr4" draw:text-style-name="P6" draw:layer="layout" svg:x1="9.255cm" svg:y1="6.08cm" svg:x2="10.859cm" svg:y2="6.4cm">
          <text:p/>
        </draw:line>
        <draw:custom-shape draw:style-name="gr5" draw:text-style-name="P6" draw:layer="layout" svg:width="12.698cm" svg:height="10.793cm" svg:x="7.35cm" svg:y="2.2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style-name="gr6">
          <draw:custom-shape draw:style-name="gr7" draw:text-style-name="P8" draw:layer="layout" svg:width="2.538cm" svg:height="1.257cm" svg:x="18.138cm" svg:y="10.266cm">
            <text:p text:style-name="P7"><text:span text:style-name="T5">virtx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8" draw:text-style-name="P9" draw:layer="layout" svg:width="2.531cm" svg:height="0.622cm" svg:x="18.145cm" svg:y="11.536cm">
            <text:p text:style-name="P7"><text:span text:style-name="T5">libvi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6">
          <draw:custom-shape draw:style-name="gr9" draw:text-style-name="P8" draw:layer="layout" svg:width="2.538cm" svg:height="1.257cm" svg:x="18.145cm" svg:y="4.821cm">
            <text:p text:style-name="P7"><text:span text:style-name="T5">virtx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0" draw:text-style-name="P9" draw:layer="layout" svg:width="2.531cm" svg:height="0.622cm" svg:x="18.152cm" svg:y="6.091cm">
            <text:p text:style-name="P7"><text:span text:style-name="T5">libvi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6" xml:id="id3" draw:id="id3">
          <draw:custom-shape draw:style-name="gr11" draw:text-style-name="P8" draw:layer="layout" svg:width="2.538cm" svg:height="1.257cm" svg:x="6.715cm" svg:y="4.821cm">
            <text:p text:style-name="P7"><text:span text:style-name="T5">virtx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" draw:text-style-name="P9" draw:layer="layout" svg:width="2.531cm" svg:height="0.622cm" svg:x="6.722cm" svg:y="6.091cm">
            <text:p text:style-name="P7"><text:span text:style-name="T5">libvi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6">
          <draw:custom-shape draw:style-name="gr13" draw:text-style-name="P8" draw:layer="layout" svg:width="2.538cm" svg:height="1.257cm" svg:x="12.43cm" svg:y="11.806cm">
            <text:p text:style-name="P7"><text:span text:style-name="T5">virtx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" draw:text-style-name="P9" draw:layer="layout" svg:width="2.531cm" svg:height="0.622cm" svg:x="12.437cm" svg:y="13.076cm">
            <text:p text:style-name="P7"><text:span text:style-name="T5">libvi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6">
          <draw:custom-shape draw:style-name="gr15" draw:text-style-name="P8" draw:layer="layout" svg:width="2.538cm" svg:height="1.257cm" svg:x="6.715cm" svg:y="10.266cm">
            <text:p text:style-name="P7"><text:span text:style-name="T5">virtx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6" draw:text-style-name="P9" draw:layer="layout" svg:width="2.531cm" svg:height="0.622cm" svg:x="6.722cm" svg:y="11.536cm">
            <text:p text:style-name="P7"><text:span text:style-name="T5">libvi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style-name="gr17" draw:text-style-name="P8" draw:layer="layout" svg:width="2.538cm" svg:height="1.257cm" svg:x="12.43cm" svg:y="1.646cm">
          <text:p text:style-name="P7"><text:span text:style-name="T5">virtx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9" draw:layer="layout" svg:width="2.531cm" svg:height="0.622cm" svg:x="12.437cm" svg:y="2.916cm">
          <text:p text:style-name="P7"><text:span text:style-name="T5">libvi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10" xml:id="id1" draw:id="id1" draw:layer="layout" svg:width="2.527cm" svg:height="1.257cm" svg:x="1.766cm" svg:y="1.635cm">
          <text:p text:style-name="P7"><text:span text:style-name="T5">virt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1" draw:layer="layout" svg:width="1.903cm" svg:height="1.903cm" svg:x="2.1cm" svg:y="2.948cm">
          <draw:image xlink:href="Pictures/10000001000002580000025835CE93B60840B86D.png" xlink:type="simple" xlink:show="embed" xlink:actuate="onLoad" draw:mime-type="image/png">
            <text:p/>
          </draw:image>
        </draw:frame>
        <draw:custom-shape draw:style-name="gr21" draw:text-style-name="P12" draw:layer="layout" svg:width="5.713cm" svg:height="3.173cm" svg:x="10.815cm" svg:y="6.08cm">
          <text:p text:style-name="P7"><text:span text:style-name="T6">Shared Storage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inimum="0" draw:handle-range-y-maximum="?f1"/>
          </draw:enhanced-geometry>
        </draw:custom-shape>
        <draw:connector draw:style-name="gr22" draw:text-style-name="P11" draw:layer="layout" draw:type="curve" svg:x1="4.293cm" svg:y1="2.263cm" svg:x2="8.619cm" svg:y2="4.186cm" draw:start-shape="id1" draw:start-glue-point="1" draw:end-shape="id2" draw:end-glue-point="0" svg:d="M4293 2263c2884 0 4326 641 4326 1923" svg:viewBox="0 0 4327 1924">
          <text:p/>
        </draw:connector>
        <draw:line draw:style-name="gr4" draw:text-style-name="P6" draw:layer="layout" svg:x1="6.715cm" svg:y1="4.821cm" svg:x2="1.635cm" svg:y2="6.08cm">
          <text:p/>
        </draw:line>
        <draw:line draw:style-name="gr4" draw:text-style-name="P6" draw:layer="layout" svg:x1="6.715cm" svg:y1="5.445cm" svg:x2="6.08cm" svg:y2="6.08cm">
          <text:p/>
        </draw:line>
        <draw:frame draw:style-name="gr23" draw:layer="layout" svg:width="4.447cm" svg:height="2.887cm" svg:x="1.632cm" svg:y="6.089cm">
          <table:table>
            <table:table-column table:style-name="co1"/>
            <table:table-column table:style-name="co1"/>
            <table:table-row table:style-name="ro1">
              <table:table-cell table:style-name="ce1" table:number-columns-spanned="2">
                <text:p text:style-name="P13"><text:span text:style-name="T7">VM Inventory</text:span></text:p>
              </table:table-cell>
              <table:covered-table-cell table:style-name="standard"/>
            </table:table-row>
            <table:table-row table:style-name="ro1" table:default-cell-style-name="ce1">
              <table:table-cell>
                <text:p text:style-name="P14"><text:span text:style-name="T7">vmid</text:span></text:p>
              </table:table-cell>
              <table:table-cell>
                <text:p text:style-name="P14"><text:span text:style-name="T7">hostid</text:span></text:p>
              </table:table-cell>
            </table:table-row>
            <table:table-row table:style-name="ro2" table:default-cell-style-name="ce1">
              <table:table-cell>
                <text:p text:style-name="P14"><text:span text:style-name="T8">...</text:span></text:p>
              </table:table-cell>
              <table:table-cell>
                <text:p text:style-name="P14"><text:span text:style-name="T8">...</text:span></text:p>
              </table:table-cell>
            </table:table-row>
            <table:table-row table:style-name="ro3" table:default-cell-style-name="ce1">
              <table:table-cell>
                <text:p text:style-name="P14"><text:span text:style-name="T7">1</text:span></text:p>
              </table:table-cell>
              <table:table-cell>
                <text:p text:style-name="P14"><text:span text:style-name="T7">20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24" draw:text-style-name="P6" draw:layer="layout" svg:x1="2.582cm" svg:y1="8.408cm" svg:x2="3.852cm" svg:y2="8.409cm">
          <text:p/>
        </draw:line>
        <draw:connector draw:style-name="gr22" draw:text-style-name="P11" draw:layer="layout" draw:type="curve" svg:x1="7.984cm" svg:y1="6.713cm" svg:x2="14.334cm" svg:y2="11.16cm" draw:start-shape="id3" draw:start-glue-point="2" draw:end-shape="id4" draw:end-glue-point="0" svg:d="M7984 6713c0 3336 6350 1113 6350 4447" svg:viewBox="0 0 6351 4448">
          <text:p/>
        </draw:connector>
        <draw:custom-shape draw:style-name="gr25" draw:text-style-name="P9" xml:id="id4" draw:id="id4" draw:layer="layout" svg:width="1.268cm" svg:height="0.622cm" svg:x="13.7cm" svg:y="11.16cm">
          <text:p text:style-name="P7"><text:span text:style-name="T5">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9" draw:layer="layout" svg:width="1.268cm" svg:height="0.622cm" svg:x="7.985cm" svg:y="9.62cm">
          <text:p text:style-name="P7"><text:span text:style-name="T5">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7" draw:text-style-name="P9" xml:id="id2" draw:id="id2" draw:layer="layout" svg:width="1.268cm" svg:height="0.622cm" svg:x="7.985cm" svg:y="4.186cm">
          <text:p text:style-name="P7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" draw:text-style-name="P9" draw:layer="layout" svg:width="1.268cm" svg:height="0.622cm" svg:x="13.7cm" svg:y="1.011cm">
          <text:p text:style-name="P7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9" draw:layer="layout" svg:width="1.268cm" svg:height="0.622cm" svg:x="19.415cm" svg:y="4.186cm">
          <text:p text:style-name="P7"><text:span text:style-name="T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9" draw:layer="layout" svg:width="1.268cm" svg:height="0.622cm" svg:x="19.415cm" svg:y="9.642cm">
          <text:p text:style-name="P7"><text:span text:style-name="T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" draw:text-style-name="P16" draw:layer="layout" svg:width="2.538cm" svg:height="1.268cm" svg:x="16.875cm" svg:y="2.27cm">
          <text:p text:style-name="P15"><text:span text:style-name="T9">se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16" draw:layer="layout" svg:width="2.538cm" svg:height="1.268cm" svg:x="18.875cm" svg:y="7.27cm">
          <text:p text:style-name="P15"><text:span text:style-name="T9">se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16" draw:layer="layout" svg:width="2.538cm" svg:height="1.268cm" svg:x="16.24cm" svg:y="12.43cm">
          <text:p text:style-name="P15"><text:span text:style-name="T9">se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16" draw:layer="layout" svg:width="2.538cm" svg:height="1.268cm" svg:x="9.89cm" svg:y="12.43cm">
          <text:p text:style-name="P15"><text:span text:style-name="T9">se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2" draw:text-style-name="P11" draw:layer="layout" draw:type="curve" svg:x1="14.968cm" svg:y1="11.471cm" svg:x2="9.253cm" svg:y2="4.497cm" draw:start-shape="id4" draw:start-glue-point="1" draw:end-shape="id2" draw:end-glue-point="1" svg:d="M14968 11471c750 0 3607-6974-5715-6974" svg:viewBox="0 0 6718 6975">
          <text:p/>
        </draw:connector>
        <draw:connector draw:style-name="gr22" draw:text-style-name="P11" draw:layer="layout" draw:type="curve" svg:x1="9.253cm" svg:y1="4.497cm" svg:x2="3.029cm" svg:y2="1.635cm" draw:start-shape="id2" draw:start-glue-point="1" draw:end-shape="id1" draw:end-glue-point="0" svg:d="M9253 4497c750 0 626-1681-1118-2584s-5106-1028-5106-278" svg:viewBox="0 0 6661 3353">
          <text:p/>
        </draw:connector>
        <draw:line draw:style-name="gr4" draw:text-style-name="P6" draw:layer="layout" svg:x1="18.145cm" svg:y1="11.525cm" svg:x2="16.528cm" svg:y2="8.839cm">
          <text:p/>
        </draw:line>
        <draw:line draw:style-name="gr4" draw:text-style-name="P6" draw:layer="layout" svg:x1="14.97cm" svg:y1="11.16cm" svg:x2="14.961cm" svg:y2="9.196cm">
          <text:p/>
        </draw:line>
        <draw:line draw:style-name="gr4" draw:text-style-name="P6" draw:layer="layout" svg:x1="9.255cm" svg:y1="11.536cm" svg:x2="10.806cm" svg:y2="8.891cm">
          <text:p/>
        </draw:line>
        <draw:line draw:style-name="gr4" draw:text-style-name="P6" draw:layer="layout" svg:x1="13.7cm" svg:y1="3.54cm" svg:x2="13.701cm" svg:y2="6.08cm">
          <text:p/>
        </draw:line>
        <draw:line draw:style-name="gr4" draw:text-style-name="P6" draw:layer="layout" svg:x1="18.145cm" svg:y1="6.091cm" svg:x2="16.519cm" svg:y2="6.452cm">
          <text:p/>
        </draw:line>
        <presentation:notes draw:style-name="dp2">
          <draw:page-thumbnail draw:style-name="gr2" draw:layer="layout" svg:width="18.607cm" svg:height="10.476cm" svg:x="1.491cm" svg:y="2.123cm" draw:page-number="3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chitecture" draw:style-name="dp1" draw:master-page-name="Default_20_1">
        <office:forms form:automatic-focus="false" form:apply-design-mode="false"/>
        <draw:custom-shape draw:name="PlaceHolder 15" draw:style-name="gr35" draw:text-style-name="P4" draw:layer="layout" svg:width="21.286cm" svg:height="0.951cm" svg:x="1.271cm" svg:y="0.943cm">
          <text:p text:style-name="P3"><text:span text:style-name="T4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3" presentation:style-name="pr1" draw:text-style-name="P2" draw:layer="layout" svg:width="20.586cm" svg:height="6.158cm" svg:x="1.4cm" svg:y="2.354cm" presentation:class="title" presentation:user-transformed="true">
          <draw:text-box>
            <text:p text:style-name="P1"><text:span text:style-name="T10">Serf:</text:span><text:span text:style-name="T11"> </text:span><text:span text:style-name="T11">cluster </text:span><text:span text:style-name="T11">members</text:span><text:span text:style-name="T11">hip and </text:span><text:span text:style-name="T11">distributi</text:span><text:span text:style-name="T11">on of </text:span><text:span text:style-name="T11">events, + </text:span><text:span text:style-name="T11">network-</text:span><text:span text:style-name="T11">based </text:span><text:span text:style-name="T11">health </text:span><text:span text:style-name="T11">check</text:span><text:span text:style-name="T11"><text:line-break/></text:span><text:span text:style-name="T11">SWIM </text:span><text:span text:style-name="T11">(Scalable </text:span><text:span text:style-name="T11">Weakly-</text:span><text:span text:style-name="T11">consisten</text:span><text:span text:style-name="T11">t </text:span><text:span text:style-name="T11">Infection-</text:span><text:span text:style-name="T11">style </text:span><text:span text:style-name="T11">Members</text:span><text:span text:style-name="T11">hip)</text:span><text:span text:style-name="T11"><text:line-break/></text:span><text:span text:style-name="T11"><text:a xlink:href="https://en.wikipedia.org/wiki/SWIM_Protocol" xlink:type="simple">https://en.wikipedia.org/wiki/SWIM_Protocol</text:a></text:span><text:span text:style-name="T11"><text:line-break/></text:span><text:span text:style-name="T12"><text:line-break/></text:span><text:span text:style-name="T10">shared </text:span><text:span text:style-name="T10">storage:</text:span><text:span text:style-name="T11"> </text:span><text:span text:style-name="T11">register </text:span><text:span text:style-name="T11">for VMs </text:span><text:span text:style-name="T11">and </text:span><text:span text:style-name="T11">hosts, </text:span><text:span text:style-name="T11">sanlock </text:span><text:span text:style-name="T11">lockspac</text:span><text:span text:style-name="T11">e and </text:span><text:span text:style-name="T11">lock files, </text:span><text:span text:style-name="T11">vdisks</text:span><text:span text:style-name="T11"><text:line-break/></text:span><text:span text:style-name="T12"><text:line-break/></text:span><text:span text:style-name="T10">sanlock: </text:span><text:span text:style-name="T11">manage </text:span><text:span text:style-name="T11">shared </text:span><text:span text:style-name="T11">lockspac</text:span><text:span text:style-name="T11">e for both </text:span><text:span text:style-name="T11">vdisks </text:span><text:span text:style-name="T11">and luns </text:span><text:span text:style-name="T11">+ storage-</text:span><text:span text:style-name="T11">based </text:span><text:span text:style-name="T11">health ck</text:span><text:span text:style-name="T12"><text:line-break/></text:span><text:span text:style-name="T12"><text:line-break/></text:span><text:span text:style-name="T10">virtxd: </text:span><text:span text:style-name="T11">serves </text:span><text:span text:style-name="T11">the REST </text:span><text:span text:style-name="T11">API, </text:span><text:span text:style-name="T11">comms </text:span><text:span text:style-name="T11">with serf </text:span><text:span text:style-name="T11">and libvirt </text:span><text:span text:style-name="T11">to </text:span><text:span text:style-name="T11">execute </text:span><text:span text:style-name="T11">the </text:span><text:span text:style-name="T11">requests</text:span><text:span text:style-name="T11"><text:line-break/></text:span><text:span text:style-name="T13">virtx </text:span><text:span text:style-name="T13">client:</text:span><text:span text:style-name="T14"> </text:span><text:span text:style-name="T14">connects </text:span><text:span text:style-name="T14">to virtxd </text:span><text:span text:style-name="T14">api server </text:span><text:span text:style-name="T14">for REST </text:span><text:span text:style-name="T14">ops</text:span><text:span text:style-name="T14"><text:line-break/></text:span><text:span text:style-name="T15"><text:line-break/></text:span><text:span text:style-name="T16">libvirt</text:span><text:span text:style-name="T15">: </text:span><text:span text:style-name="T15">runs the </text:span><text:span text:style-name="T15">VMs with </text:span><text:span text:style-name="T15">QEMU, </text:span><text:span text:style-name="T14">hugepage</text:span><text:span text:style-name="T14">s-aware </text:span><text:span text:style-name="T14">placemen</text:span><text:span text:style-name="T14">t via </text:span><text:span text:style-name="T13">numa-</text:span><text:span text:style-name="T13">preplace</text:span><text:span text:style-name="T14"><text:line-break/></text:span><text:span text:style-name="T14"><text:line-break/></text:span><text:span text:style-name="T14"><text:a xlink:href="https://www.youtube.com/watch?v=cnINrLWWFao" xlink:type="simple">https://www.youtube.com/watch?v=cnINrLWWFao</text:a></text:span><text:span text:style-name="T14"><text:line-break/></text:span><text:span text:style-name="T14"/></text:p>
          </draw:text-box>
        </draw:frame>
        <presentation:notes draw:style-name="dp2">
          <draw:page-thumbnail draw:style-name="gr2" draw:layer="layout" svg:width="18.607cm" svg:height="10.476cm" svg:x="1.491cm" svg:y="2.123cm" draw:page-number="4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>
        <office:forms form:automatic-focus="false" form:apply-design-mode="false"/>
        <draw:connector draw:style-name="gr36" draw:text-style-name="P18" draw:layer="layout" svg:x1="2.548cm" svg:y1="7.937cm" svg:x2="1.905cm" svg:y2="12.208cm" draw:start-shape="id5" draw:start-glue-point="3" draw:end-shape="id6" draw:end-glue-point="3" svg:d="M2548 7937h-643v4271" svg:viewBox="0 0 644 4272">
          <text:p/>
        </draw:connector>
        <draw:custom-shape draw:style-name="gr37" draw:text-style-name="P19" xml:id="id6" draw:id="id6" draw:layer="layout" svg:width="21.589cm" svg:height="0.98cm" svg:x="1.905cm" svg:y="11.718cm">
          <text:p text:style-name="P15"><text:span text:style-name="T17">||||| <text:s/>HOST / OS <text:s text:c="105"/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20" draw:layer="layout" svg:width="5.079cm" svg:height="1.269cm" svg:x="18.415cm" svg:y="6.985cm">
          <text:p text:style-name="P7"><text:span text:style-name="T18">Serf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9" draw:text-style-name="P9" xml:id="id11" draw:id="id11" draw:layer="layout" svg:width="3.166cm" svg:height="1.257cm" svg:x="10.175cm" svg:y="9.537cm">
          <text:p text:style-name="P7"><text:span text:style-name="T5">libvi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0" draw:text-style-name="P9" xml:id="id14" draw:id="id14" draw:layer="layout" svg:width="2.531cm" svg:height="1.257cm" svg:x="13.342cm" svg:y="9.537cm">
          <text:p text:style-name="P7"><text:span text:style-name="T5">x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6">
          <draw:custom-shape draw:style-name="gr41" draw:text-style-name="P9" draw:layer="layout" svg:width="21.584cm" svg:height="1.896cm" svg:x="1.909cm" svg:y="0.905cm">
            <text:p text:style-name="P7"><text:span text:style-name="T19">Shared Stor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2" draw:text-style-name="P21" xml:id="id10" draw:id="id10" draw:layer="layout" svg:width="7.704cm" svg:height="1.466cm" svg:x="1.905cm" svg:y="2.81cm">
            <text:p text:style-name="P15"><text:span text:style-name="T20">Lockspace <text:s/></text:span><text:span text:style-name="T21">/vms/lock/__vx__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3" draw:text-style-name="P9" draw:layer="layout" svg:width="6.434cm" svg:height="0.626cm" svg:x="3.175cm" svg:y="3.65cm">
            <text:p text:style-name="P7"><text:span text:style-name="T22">Lockfile <text:s/></text:span><text:span text:style-name="T21">/vms/lock/ID/ID <text:s/>LV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4" draw:text-style-name="P9" xml:id="id8" draw:id="id8" draw:layer="layout" svg:width="13.869cm" svg:height="1.462cm" svg:x="9.624cm" svg:y="2.814cm">
            <text:p text:style-name="P7"><text:span text:style-name="T20">VM / Host register <text:s/></text:span><text:span text:style-name="T21">/vms/xm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5" draw:text-style-name="P9" draw:layer="layout" svg:width="7.7cm" svg:height="0.955cm" svg:x="1.909cm" svg:y="1.846cm">
            <text:p text:style-name="P7"><text:span text:style-name="T20">NFS Datastore <text:s/></text:span><text:span text:style-name="T21">/vms/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6" draw:text-style-name="P9" draw:layer="layout" svg:width="7.526cm" svg:height="0.955cm" svg:x="9.619cm" svg:y="1.846cm">
            <text:p text:style-name="P7"><text:span text:style-name="T20">NFS Datastore… <text:s/></text:span><text:span text:style-name="T21">/vms/ds/d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7" draw:text-style-name="P9" draw:layer="layout" svg:width="6.344cm" svg:height="0.955cm" svg:x="17.145cm" svg:y="1.846cm">
            <text:p text:style-name="P7"><text:span text:style-name="T20">Cloud Init ISOs <text:s/></text:span><text:span text:style-name="T21">/vms/ds/c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style-name="gr48" draw:text-style-name="P9" xml:id="id9" draw:id="id9" draw:layer="layout" svg:width="3.802cm" svg:height="1.257cm" svg:x="2.539cm" svg:y="5.721cm">
          <text:p text:style-name="P7"><text:span text:style-name="T5">san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11" draw:layer="layout" draw:line-skew="0.001cm" svg:x1="14.595cm" svg:y1="5.715cm" svg:x2="16.558cm" svg:y2="4.276cm" draw:start-shape="id7" draw:start-glue-point="0" draw:end-shape="id8" draw:end-glue-point="2" svg:d="M14595 5715v-718h1963v-721" svg:viewBox="0 0 1964 1440">
          <text:p/>
        </draw:connector>
        <draw:connector draw:style-name="gr50" draw:text-style-name="P11" draw:layer="layout" draw:type="line" svg:x1="4.44cm" svg:y1="5.721cm" svg:x2="5.757cm" svg:y2="4.276cm" draw:start-shape="id9" draw:start-glue-point="0" draw:end-shape="id10" draw:end-glue-point="2" svg:d="M4440 5721l1317-1445" svg:viewBox="0 0 1318 1446">
          <text:p/>
        </draw:connector>
        <draw:custom-shape draw:style-name="gr51" draw:text-style-name="P9" xml:id="id12" draw:id="id12" draw:layer="layout" svg:width="3.802cm" svg:height="1.257cm" svg:x="2.547cm" svg:y="9.537cm">
          <text:p text:style-name="P7"><text:span text:style-name="T22">numa-prepl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2" draw:text-style-name="P6" draw:layer="layout" svg:x1="3.81cm" svg:y1="10.795cm" svg:x2="3.811cm" svg:y2="11.718cm">
          <text:p/>
        </draw:line>
        <draw:connector draw:style-name="gr22" draw:text-style-name="P11" draw:layer="layout" draw:type="curve" svg:x1="10.175cm" svg:y1="10.165cm" svg:x2="6.349cm" svg:y2="10.165cm" draw:start-shape="id11" draw:start-glue-point="3" draw:end-shape="id12" draw:end-glue-point="1" svg:d="M10175 10165h-3826" svg:viewBox="0 0 3827 1">
          <text:p/>
        </draw:connector>
        <draw:connector draw:style-name="gr53" draw:text-style-name="P23" draw:layer="layout" draw:type="curve" svg:x1="11.758cm" svg:y1="9.537cm" svg:x2="8.416cm" svg:y2="8.255cm" draw:start-shape="id11" draw:start-glue-point="0" draw:end-shape="id13" draw:end-glue-point="2" svg:d="M11758 9537c0-961-3342-321-3342-1282" svg:viewBox="0 0 3343 1283">
          <text:p text:style-name="P22"><text:span text:style-name="T23">lifecycle</text:span></text:p>
        </draw:connector>
        <draw:line draw:style-name="gr54" draw:text-style-name="P24" draw:layer="layout" svg:x1="15.865cm" svg:y1="7.155cm" svg:x2="18.406cm" svg:y2="7.156cm">
          <text:p text:style-name="P13"><text:span text:style-name="T24">HI</text:span></text:p>
          <text:p text:style-name="P13"><text:span text:style-name="T21"/></text:p>
        </draw:line>
        <draw:line draw:style-name="gr54" draw:text-style-name="P24" draw:layer="layout" svg:x1="15.863cm" svg:y1="7.648cm" svg:x2="18.404cm" svg:y2="7.649cm">
          <text:p text:style-name="P13"><text:span text:style-name="T24">VI/VE</text:span></text:p>
          <text:p text:style-name="P13"><text:span text:style-name="T21"/></text:p>
        </draw:line>
        <draw:line draw:style-name="gr54" draw:text-style-name="P24" draw:layer="layout" svg:x1="15.871cm" svg:y1="8.127cm" svg:x2="18.412cm" svg:y2="8.128cm">
          <text:p text:style-name="P13"><text:span text:style-name="T24">ME</text:span></text:p>
          <text:p text:style-name="P13"><text:span text:style-name="T21"/></text:p>
        </draw:line>
        <draw:line draw:style-name="gr55" draw:text-style-name="P24" draw:layer="layout" svg:x1="23.488cm" svg:y1="7.62cm" svg:x2="25.4cm" svg:y2="7.621cm">
          <text:p/>
        </draw:line>
        <draw:connector draw:style-name="gr56" draw:text-style-name="P11" draw:layer="layout" draw:line-skew="1.371cm" svg:x1="15.874cm" svg:y1="6.349cm" svg:x2="15.873cm" svg:y2="10.165cm" draw:start-shape="id7" draw:start-glue-point="1" draw:end-shape="id14" draw:end-glue-point="1" svg:d="M15874 6349h1371v3816h-1372" svg:viewBox="0 0 1373 3817">
          <text:p/>
        </draw:connector>
        <draw:custom-shape draw:style-name="gr57" draw:text-style-name="P8" draw:layer="layout" svg:width="2.538cm" svg:height="1.269cm" svg:x="13.336cm" svg:y="6.985cm">
          <text:p text:style-name="P7"><text:span text:style-name="T21">serfcom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8" draw:text-style-name="P8" xml:id="id13" draw:id="id13" draw:layer="layout" svg:width="2.863cm" svg:height="1.269cm" svg:x="6.985cm" svg:y="6.986cm">
          <text:p text:style-name="P7"><text:span text:style-name="T22">hypervi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9" draw:text-style-name="P8" xml:id="id7" draw:id="id7" draw:layer="layout" svg:width="2.557cm" svg:height="1.269cm" svg:x="13.317cm" svg:y="5.715cm">
          <text:p text:style-name="P7"><text:span text:style-name="T22">vmre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0" draw:text-style-name="P8" draw:layer="layout" svg:width="3.485cm" svg:height="1.269cm" svg:x="9.849cm" svg:y="5.715cm">
          <text:p text:style-name="P7"><text:span text:style-name="T22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1" draw:text-style-name="P8" xml:id="id16" draw:id="id16" draw:layer="layout" svg:width="2.863cm" svg:height="1.269cm" svg:x="6.985cm" svg:y="5.715cm">
          <text:p text:style-name="P7"><text:span text:style-name="T22">lock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2" draw:text-style-name="P8" draw:layer="layout" svg:width="3.485cm" svg:height="1.269cm" svg:x="9.849cm" svg:y="6.985cm">
          <text:p text:style-name="P7"><text:span text:style-name="T22">inven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3" draw:text-style-name="P8" xml:id="id18" draw:id="id18" draw:layer="layout" svg:width="2.531cm" svg:height="0.634cm" svg:x="13.342cm" svg:y="8.255cm">
          <text:p text:style-name="P7"><text:span text:style-name="T22">vmde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4" draw:text-style-name="P9" draw:layer="layout" svg:width="2.539cm" svg:height="0.622cm" svg:x="6.985cm" svg:y="5.093cm">
          <text:p text:style-name="P7"><text:span text:style-name="T22">virtx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6" xml:id="id17" draw:id="id17">
          <draw:custom-shape draw:style-name="gr65" draw:text-style-name="P26" xml:id="id5" draw:id="id5" draw:layer="layout" svg:width="3.802cm" svg:height="0.635cm" svg:x="2.548cm" svg:y="7.62cm">
            <text:p text:style-name="P25"><text:span text:style-name="T25">systeminfo (host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6" draw:text-style-name="P28" xml:id="id15" draw:id="id15" draw:layer="layout" svg:width="3.802cm" svg:height="0.635cm" svg:x="2.54cm" svg:y="8.255cm">
            <text:p text:style-name="P27"><text:span text:style-name="T26">systeminfo (vm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onnector draw:style-name="gr36" draw:text-style-name="P18" draw:layer="layout" draw:line-skew="-0.635cm" svg:x1="2.54cm" svg:y1="8.572cm" svg:x2="11.758cm" svg:y2="9.537cm" draw:start-shape="id15" draw:start-glue-point="3" draw:end-shape="id11" draw:end-glue-point="0" svg:d="M2540 8572h-635v642h9853v323" svg:viewBox="0 0 9854 966">
          <text:p/>
        </draw:connector>
        <draw:connector draw:style-name="gr36" draw:text-style-name="P18" draw:layer="layout" svg:x1="6.341cm" svg:y1="6.349cm" svg:x2="6.985cm" svg:y2="6.349cm" draw:start-shape="id9" draw:start-glue-point="1" draw:end-shape="id16" draw:end-glue-point="3" svg:d="M6341 6349h644" svg:viewBox="0 0 645 1">
          <text:p/>
        </draw:connector>
        <draw:connector draw:style-name="gr36" draw:text-style-name="P18" draw:layer="layout" svg:x1="6.985cm" svg:y1="7.62cm" svg:x2="6.35cm" svg:y2="8.255cm" draw:start-shape="id13" draw:start-glue-point="3" draw:end-shape="id17" draw:end-glue-point="1" svg:d="M6985 7620h-317v635h-318" svg:viewBox="0 0 636 636">
          <text:p/>
        </draw:connector>
        <draw:connector draw:style-name="gr50" draw:text-style-name="P11" draw:layer="layout" draw:type="line" svg:x1="14.607cm" svg:y1="9.537cm" svg:x2="14.607cm" svg:y2="8.889cm" draw:start-shape="id14" draw:start-glue-point="0" draw:end-shape="id18" draw:end-glue-point="2" svg:d="M14607 9537v-648" svg:viewBox="0 0 1 649">
          <text:p/>
        </draw:connector>
        <draw:line draw:style-name="gr52" draw:text-style-name="P6" draw:layer="layout" svg:x1="11.811cm" svg:y1="10.796cm" svg:x2="11.812cm" svg:y2="11.719cm">
          <text:p/>
        </draw:line>
        <presentation:notes draw:style-name="dp2">
          <draw:page-thumbnail draw:style-name="gr2" draw:layer="layout" svg:width="18.607cm" svg:height="10.476cm" svg:x="1.49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>
        <office:forms form:automatic-focus="false" form:apply-design-mode="false"/>
        <draw:custom-shape draw:name="PlaceHolder 69" draw:style-name="gr67" draw:text-style-name="P4" draw:layer="layout" svg:width="21.286cm" svg:height="0.951cm" svg:x="1.271cm" svg:y="0.943cm">
          <text:p text:style-name="P3"><text:span text:style-name="T4">Architecture Advant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laceHolder 70" draw:style-name="gr68" draw:text-style-name="P30" draw:layer="layout" svg:width="20.586cm" svg:height="6.158cm" svg:x="1.27cm" svg:y="2.093cm">
          <text:p text:style-name="P29"><text:span text:style-name="T20">- simple automation of the KVM host deployment (out of scope of VirtX): all KVM hosts are from the cluster perspective identical. Main application is one binary.</text:span></text:p>
          <text:p text:style-name="P29"><text:span text:style-name="T20">- debuggable, can reason on the events and the sanlock leases on shared storage. Storage is the final arbiter of correctness, and self-fencing helps avoid split-brain. No etcd, complex database, scheduler or complex control plane to debug.</text:span></text:p>
          <text:p text:style-name="P29"><text:span text:style-name="T20">- no minimum number of hosts or dedicated infra nodes, the deployment can scale down to 1. REST API makes it very easy to interact with the cluster, contacting any arbitrary host.</text:span></text:p>
          <text:p text:style-name="P29"><text:span text:style-name="T20">- Libvirt and vmreg redundancy: leveraging the libvirt per-host register provides a backup for the central vmreg (...and vice versa).</text:span></text:p>
          <text:p text:style-name="P29"><text:span text:style-name="T20">- scope is mostly limited to compute, no complex storage or network abstraction layers to reconcile. Storage is passed as-is to the VMs, whose management is delegated to dedicated external storage infra. Similar with Network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07cm" svg:height="10.476cm" svg:x="1.491cm" svg:y="2.123cm" draw:page-number="6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>
        <office:forms form:automatic-focus="false" form:apply-design-mode="false"/>
        <draw:custom-shape draw:name="PlaceHolder 71" draw:style-name="gr69" draw:text-style-name="P4" draw:layer="layout" svg:width="21.286cm" svg:height="0.951cm" svg:x="1.271cm" svg:y="0.943cm">
          <text:p text:style-name="P3"><text:span text:style-name="T4">Architecture Disadvant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laceHolder 72" draw:style-name="gr70" draw:text-style-name="P30" draw:layer="layout" svg:width="20.586cm" svg:height="6.158cm" svg:x="1.27cm" svg:y="2.093cm">
          <text:p text:style-name="P29"><text:span text:style-name="T20">- no real workload scheduler. Workloads are assumed to be mostly static. Workload assignment is mostly manual.</text:span></text:p>
          <text:p text:style-name="P29"><text:span text:style-name="T20">- serf cluster is only “eventually consistent”, does not have strong consistency.</text:span></text:p>
          <text:p text:style-name="P29"><text:span text:style-name="T20">Failed requests should be retried.</text:span></text:p>
          <text:p text:style-name="P29"><text:span text:style-name="T20">- parallelism: any backend op that affects shared resources needs careful development (vmreg access, lock space initialization or storage resource lease creation…) to avoid race conditions, conflicts, data corruption.</text:span></text:p>
          <text:p text:style-name="P29"><text:span text:style-name="T20">- shared storage is critical – everything relies on it, so if shared storage is not accessible, the whole cluster is not operational.</text:span></text:p>
          <text:p text:style-name="P29"><text:span text:style-name="T20">- no real multi-tenancy model, or API spl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07cm" svg:height="10.476cm" svg:x="1.491cm" svg:y="2.123cm" draw:page-number="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>
        <office:forms form:automatic-focus="false" form:apply-design-mode="false"/>
        <draw:custom-shape draw:name="PlaceHolder 73" draw:style-name="gr71" draw:text-style-name="P4" draw:layer="layout" svg:width="21.286cm" svg:height="0.951cm" svg:x="1.271cm" svg:y="0.943cm">
          <text:p text:style-name="P3"><text:span text:style-name="T4">Architecture Unknow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laceHolder 74" draw:style-name="gr72" draw:text-style-name="P30" draw:layer="layout" svg:width="20.586cm" svg:height="6.158cm" svg:x="1.27cm" svg:y="2.093cm">
          <text:p text:style-name="P29"><text:span text:style-name="T20"/></text:p>
          <text:p text:style-name="P29"><text:span text:style-name="T20">- scalability: needs to be tested. Should be ok in theory for the assumed limit of ~10000 Vms (100 hosts x 100 VMs), but it as yet unproven.</text:span></text:p>
          <text:p text:style-name="P29"><text:span text:style-name="T20"/></text:p>
          <text:p text:style-name="P29"><text:span text:style-name="T20">- ecosystem: none. Large consolidated platforms have connectors and drivers for measurements, automation, deployment, etc. Nothing exists yet for VirtX.</text:span></text:p>
          <text:p text:style-name="P29"><text:span text:style-name="T20"/></text:p>
          <text:p text:style-name="P29"><text:span text:style-name="T20">- sanlock locking and self-fencing: locking needs more testing and validation, and the fencing aspects are still to be carefully considered.</text:span></text:p>
          <text:p text:style-name="P29"><text:span text:style-name="T20"/></text:p>
          <text:p text:style-name="P29"><text:span text:style-name="T20">- VirtX is still at the prototype stage, no commercial support.</text:span></text:p>
          <text:p text:style-name="P29"><text:span text:style-name="T20"/></text:p>
          <text:p text:style-name="P29"><text:span text:style-name="T20"/></text:p>
          <text:p text:style-name="P29"><text:span text:style-name="T20"/></text:p>
          <text:p text:style-name="P29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07cm" svg:height="10.476cm" svg:x="1.491cm" svg:y="2.123cm" draw:page-number="8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name="PlaceHolder 35" draw:style-name="gr73" draw:text-style-name="P4" draw:layer="layout" svg:width="21.286cm" svg:height="0.951cm" svg:x="1.271cm" svg:y="0.943cm">
          <text:p text:style-name="P3"><text:span text:style-name="T4">REST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36" presentation:style-name="pr3" draw:text-style-name="P2" draw:layer="layout" svg:width="20.586cm" svg:height="10.346cm" svg:x="1.4cm" svg:y="2.354cm" presentation:class="title" presentation:user-transformed="true">
          <draw:text-box>
            <text:p text:style-name="P1"><text:span text:style-name="T27">VirtX API is </text:span><text:span text:style-name="T27">a REST </text:span><text:span text:style-name="T27">OpenAPI </text:span><text:span text:style-name="T27">3.1 </text:span><text:span text:style-name="T27">specificati</text:span><text:span text:style-name="T27">on, </text:span><text:span text:style-name="T27">maintaine</text:span><text:span text:style-name="T27">d as a </text:span><text:span text:style-name="T27">single </text:span><text:span text:style-name="T27">openapi-3.</text:span><text:span text:style-name="T27">1.yaml file.</text:span><text:span text:style-name="T27"><text:line-break/></text:span><text:span text:style-name="T27">The API is </text:span><text:span text:style-name="T27">turned into </text:span><text:span text:style-name="T27">a set of Go </text:span><text:span text:style-name="T27">data types </text:span><text:span text:style-name="T27">called the </text:span><text:span text:style-name="T27">“model”, </text:span><text:span text:style-name="T27">using:</text:span><text:span text:style-name="T27"><text:line-break/></text:span><text:span text:style-name="T27"><text:line-break/></text:span><text:span text:style-name="T27"><text:a xlink:href="https://github.com/openapitools/openapi-generator-cli" xlink:type="simple">https://github.com/openapitools/openapi-generator-cli</text:a></text:span><text:span text:style-name="T27"><text:line-break/></text:span><text:span text:style-name="T27"><text:line-break/></text:span><text:span text:style-name="T27">with this </text:span><text:span text:style-name="T27">incantatio</text:span><text:span text:style-name="T27">n:</text:span><text:span text:style-name="T27"><text:line-break/></text:span><text:span text:style-name="T27"><text:line-break/></text:span><text:span text:style-name="T28">java -jar </text:span><text:span text:style-name="T28">openapi-</text:span><text:span text:style-name="T28">generator-</text:span><text:span text:style-name="T28">cli.jar </text:span><text:span text:style-name="T28">generate --</text:span><text:span text:style-name="T28">type-</text:span><text:span text:style-name="T28">mappings </text:span><text:span text:style-name="T28">integer+int</text:span><text:span text:style-name="T28">16=int16 \</text:span></text:p>
            <text:p text:style-name="P1"><text:span text:style-name="T28"><text:s text:c="5"/></text:span><text:span text:style-name="T28">--</text:span><text:span text:style-name="T28">additional-</text:span><text:span text:style-name="T28">properties=</text:span><text:span text:style-name="T28">generateMar</text:span><text:span text:style-name="T28">shalJSON=fa</text:span><text:span text:style-name="T28">lse,generat</text:span><text:span text:style-name="T28">eUnmarshalJ</text:span><text:span text:style-name="T28">SON=false \</text:span></text:p>
            <text:p text:style-name="P1"><text:span text:style-name="T29"><text:s text:c="5"/></text:span><text:span text:style-name="T29">-o </text:span><text:span text:style-name="T29">client/ -g </text:span><text:span text:style-name="T29">go -i </text:span><text:span text:style-name="T29">openapi-3.1</text:span><text:span text:style-name="T29">.yaml -t </text:span><text:span text:style-name="T29">templates/</text:span></text:p>
            <text:p text:style-name="P1"><text:span text:style-name="T27">and some </text:span><text:span text:style-name="T27">customiza</text:span><text:span text:style-name="T27">tion </text:span><text:span text:style-name="T27">templates </text:span><text:span text:style-name="T27">in </text:span><text:span text:style-name="T27">templates/</text:span><text:span text:style-name="T27"><text:line-break/></text:span><text:span text:style-name="T27">after code </text:span><text:span text:style-name="T27">generation</text:span><text:span text:style-name="T27">, the model </text:span><text:span text:style-name="T27">files are </text:span><text:span text:style-name="T27">extracted </text:span><text:span text:style-name="T27">to the virtx </text:span><text:span text:style-name="T27">pkg/model</text:span><text:span text:style-name="T27">.</text:span><text:span text:style-name="T27"><text:line-break/></text:span><text:span text:style-name="T27"><text:line-break/></text:span><text:span text:style-name="T27">There is a </text:span><text:span text:style-name="T27">small </text:span><text:span text:style-name="T27">adapter </text:span><text:span text:style-name="T27">layer in </text:span><text:span text:style-name="T27">pkg/model</text:span><text:span text:style-name="T27">/virtx_mod</text:span><text:span text:style-name="T27">el.go</text:span><text:span text:style-name="T27"><text:line-break/></text:span><text:span text:style-name="T27">that </text:span><text:span text:style-name="T27">extends </text:span><text:span text:style-name="T27">some of </text:span><text:span text:style-name="T27">these </text:span><text:span text:style-name="T27">types with </text:span><text:span text:style-name="T27">additional </text:span><text:span text:style-name="T27">methods,</text:span><text:span text:style-name="T27"><text:line-break/></text:span><text:span text:style-name="T27">mainly .Str</text:span><text:span text:style-name="T27">ing() </text:span><text:span text:style-name="T27">and .Parse</text:span><text:span text:style-name="T27">() to </text:span><text:span text:style-name="T27">convert to </text:span><text:span text:style-name="T27">and from a </text:span><text:span text:style-name="T27">string </text:span><text:span text:style-name="T27">form.</text:span><text:span text:style-name="T27"><text:line-break/></text:span><text:span text:style-name="T27"><text:line-break/></text:span><text:span text:style-name="T27"/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74" draw:text-style-name="P31" draw:layer="layout" svg:width="17.537cm" svg:height="14.3cm" svg:x="0cm" svg:y="0.001cm">
          <draw:image xlink:href="Pictures/10000001000004D3000003EF353AFC5D93BE78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>
        <office:forms form:automatic-focus="false" form:apply-design-mode="false"/>
        <draw:custom-shape draw:name="PlaceHolder 21" draw:style-name="gr75" draw:text-style-name="P4" draw:layer="layout" svg:width="21.286cm" svg:height="0.951cm" svg:x="1.271cm" svg:y="0.943cm">
          <text:p text:style-name="P3"><text:span text:style-name="T4">KVM Host statis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22" presentation:style-name="pr1" draw:text-style-name="P2" draw:layer="layout" svg:width="20.586cm" svg:height="10.346cm" svg:x="1.4cm" svg:y="2.354cm" presentation:class="title" presentation:user-transformed="true">
          <draw:text-box>
            <text:p text:style-name="P1"><text:span text:style-name="T30">How VirtX </text:span><text:span text:style-name="T30">calculates </text:span><text:span text:style-name="T30">KVM Host-</text:span><text:span text:style-name="T30">level </text:span><text:span text:style-name="T30">statistics:</text:span><text:span text:style-name="T30"><text:line-break/></text:span><text:span text:style-name="T30"><text:line-break/></text:span><text:span text:style-name="T30">virtxd </text:span><text:span text:style-name="T30">collects </text:span><text:span text:style-name="T30">system </text:span><text:span text:style-name="T30">informatio</text:span><text:span text:style-name="T30">n </text:span><text:span text:style-name="T30">(“system_i</text:span><text:span text:style-name="T30">nfo”).</text:span><text:span text:style-name="T30"><text:line-break/></text:span><text:span text:style-name="T30"><text:line-break/></text:span><text:span text:style-name="T30">System_in</text:span><text:span text:style-name="T30">fo </text:span><text:span text:style-name="T30">includes:</text:span><text:span text:style-name="T30"><text:line-break/></text:span><text:span text:style-name="T30"><text:line-break/></text:span><text:span text:style-name="T30">”immutabl</text:span><text:span text:style-name="T30">e” host </text:span><text:span text:style-name="T30">info, only </text:span><text:span text:style-name="T30">collected </text:span><text:span text:style-name="T30">once, </text:span><text:span text:style-name="T30">refreshed </text:span><text:span text:style-name="T30">only on </text:span><text:span text:style-name="T30">virtxd </text:span><text:span text:style-name="T30">restart.</text:span><text:span text:style-name="T30"><text:line-break/></text:span><text:span text:style-name="T30">”mutable” </text:span><text:span text:style-name="T30">host info, </text:span><text:span text:style-name="T30">refetched </text:span><text:span text:style-name="T30">at every </text:span><text:span text:style-name="T30">system_inf</text:span><text:span text:style-name="T30">o_loop (15 </text:span><text:span text:style-name="T30">sec)</text:span><text:span text:style-name="T30"><text:line-break/></text:span><text:span text:style-name="T30"><text:line-break/></text:span><text:span text:style-name="T30">Host info: </text:span><text:span text:style-name="T27">dmidecod</text:span><text:span text:style-name="T27">e UUID, </text:span><text:span text:style-name="T30">firmware </text:span><text:span text:style-name="T30">version, </text:span><text:span text:style-name="T30">date, OS ID </text:span><text:span text:style-name="T30">and </text:span><text:span text:style-name="T30">version, </text:span><text:span text:style-name="T30">hostname, </text:span><text:span text:style-name="T30">cpufreq/cp</text:span><text:span text:style-name="T30">uinfo_max</text:span><text:span text:style-name="T30">_freq, cpu </text:span><text:span text:style-name="T30">arch, </text:span><text:span text:style-name="T30">vendor, </text:span><text:span text:style-name="T30">model, </text:span><text:span text:style-name="T30">nodes, </text:span><text:span text:style-name="T30">sockets, </text:span><text:span text:style-name="T30">cores, </text:span><text:span text:style-name="T30">threads, </text:span><text:span text:style-name="T30">tsc freq,</text:span><text:span text:style-name="T30"><text:line-break/></text:span><text:span text:style-name="T30">sanlock </text:span><text:span text:style-name="T30">hostid, </text:span><text:span text:style-name="T30">default </text:span><text:span text:style-name="T30">hugepage </text:span><text:span text:style-name="T30">size.</text:span><text:span text:style-name="T30"><text:line-break/></text:span><text:span text:style-name="T30"><text:line-break/></text:span><text:span text:style-name="T30">Host </text:span><text:span text:style-name="T30">resources: </text:span><text:span text:style-name="T30">Normal </text:span><text:span text:style-name="T30">Memory </text:span><text:span text:style-name="T31">MiB</text:span><text:span text:style-name="T30">, Huge </text:span><text:span text:style-name="T30">Pages </text:span><text:span text:style-name="T30">(hugetlbfs) </text:span><text:span text:style-name="T31">MiB</text:span><text:span text:style-name="T30">, CPU </text:span><text:span text:style-name="T31">MHz</text:span><text:span text:style-name="T31"><text:line-break/></text:span><text:span text:style-name="T30"><text:line-break/></text:span><text:span text:style-name="T30">Resource </text:span><text:span text:style-name="T30">fields: </text:span><text:span text:style-name="T30">Total, </text:span><text:span text:style-name="T30">Used, </text:span><text:span text:style-name="T30">Free, </text:span><text:span text:style-name="T30">ReservedV</text:span><text:span text:style-name="T30">Ms, </text:span><text:span text:style-name="T30">UsedVMs, </text:span><text:span text:style-name="T30">UsedOS, </text:span><text:span text:style-name="T30">AvailableV</text:span><text:span text:style-name="T30">Ms</text:span></text:p>
          </draw:text-box>
        </draw:frame>
        <presentation:notes draw:style-name="dp2">
          <draw:page-thumbnail draw:style-name="gr2" draw:layer="layout" svg:width="18.607cm" svg:height="10.476cm" svg:x="1.491cm" svg:y="2.123cm" draw:page-number="1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>
        <office:forms form:automatic-focus="false" form:apply-design-mode="false"/>
        <draw:custom-shape draw:name="PlaceHolder 29" draw:style-name="gr76" draw:text-style-name="P4" draw:layer="layout" svg:width="21.286cm" svg:height="0.951cm" svg:x="1.271cm" svg:y="0.943cm">
          <text:p text:style-name="P3"><text:span text:style-name="T4">KVM Host re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30" presentation:style-name="pr1" draw:text-style-name="P2" draw:layer="layout" svg:width="20.586cm" svg:height="10.346cm" svg:x="1.4cm" svg:y="2.354cm" presentation:class="title" presentation:user-transformed="true">
          <draw:text-box>
            <text:p text:style-name="P1"><text:span text:style-name="T30">Host </text:span><text:span text:style-name="T30">resources: </text:span><text:span text:style-name="T30">Normal </text:span><text:span text:style-name="T30">Memory </text:span><text:span text:style-name="T31">MiB</text:span><text:span text:style-name="T30">, Huge </text:span><text:span text:style-name="T30">Pages </text:span><text:span text:style-name="T30">(hugetlbfs) </text:span><text:span text:style-name="T31">MiB</text:span><text:span text:style-name="T30">, CPU </text:span><text:span text:style-name="T31">MHz</text:span><text:span text:style-name="T31"><text:line-break/></text:span><text:span text:style-name="T30">Resource </text:span><text:span text:style-name="T30">fields: </text:span><text:span text:style-name="T30">Total, </text:span><text:span text:style-name="T30">Used, </text:span><text:span text:style-name="T30">Free, </text:span><text:span text:style-name="T30">ReservedV</text:span><text:span text:style-name="T30">Ms, </text:span><text:span text:style-name="T30">UsedVMs, </text:span><text:span text:style-name="T30">UsedOS, </text:span><text:span text:style-name="T30">AvailableV</text:span><text:span text:style-name="T30">Ms</text:span><text:span text:style-name="T30"><text:line-break/></text:span><text:span text:style-name="T30"><text:line-break/></text:span><text:span text:style-name="T32">HP</text:span><text:span text:style-name="T30">: </text:span><text:span text:style-name="T30">/proc/me</text:span><text:span text:style-name="T30">minfo </text:span><text:span text:style-name="T30">“HugePag</text:span><text:span text:style-name="T30">es_Total”, </text:span><text:span text:style-name="T30">“HugePag</text:span><text:span text:style-name="T30">es_Free”, </text:span><text:span text:style-name="T30">“Hugepag</text:span><text:span text:style-name="T30">esize"(</text:span><text:span text:style-name="T31">Tota</text:span><text:span text:style-name="T31">l, Free,</text:span><text:span text:style-name="T30"> </text:span><text:span text:style-name="T30">Used)</text:span><text:span text:style-name="T30"><text:line-break/></text:span><text:span text:style-name="T32">Mem total</text:span><text:span text:style-name="T30">: </text:span><text:span text:style-name="T30">libvirt, </text:span><text:span text:style-name="T32">Free</text:span><text:span text:style-name="T30">: </text:span><text:span text:style-name="T30">libvirt, </text:span><text:span text:style-name="T30">sysconf(_S</text:span><text:span text:style-name="T30">C_AVPHYS</text:span><text:span text:style-name="T30">_PAGES) </text:span><text:span text:style-name="T30">or </text:span><text:span text:style-name="T30">numa_nod</text:span><text:span text:style-name="T30">e_size64()</text:span><text:span text:style-name="T30"><text:line-break/></text:span><text:span text:style-name="T32">ReservedV</text:span><text:span text:style-name="T32">Ms, </text:span><text:span text:style-name="T32">UsedVMs</text:span><text:span text:style-name="T30">: </text:span><text:span text:style-name="T30">total_mem</text:span><text:span text:style-name="T30">ory_capaci</text:span><text:span text:style-name="T30">ty and </text:span><text:span text:style-name="T30">used (sum </text:span><text:span text:style-name="T30">of all vms)</text:span><text:span text:style-name="T30"><text:line-break/></text:span><text:span text:style-name="T32">AvailableV</text:span><text:span text:style-name="T32">Ms</text:span><text:span text:style-name="T30">: Total – </text:span><text:span text:style-name="T30">ReservedV</text:span><text:span text:style-name="T30">Ms – </text:span><text:span text:style-name="T30">UsedOS</text:span><text:span text:style-name="T30"><text:line-break/></text:span><text:span text:style-name="T30"><text:line-break/></text:span><text:span text:style-name="T32">CPU total</text:span><text:span text:style-name="T30">: </text:span><text:span text:style-name="T30">nodes * </text:span><text:span text:style-name="T30">sockets * </text:span><text:span text:style-name="T30">cores * </text:span><text:span text:style-name="T30">threads * </text:span><text:span text:style-name="T30">max_freq </text:span><text:span text:style-name="T31">MHz</text:span><text:span text:style-name="T31"><text:line-break/></text:span><text:span text:style-name="T30">Idle </text:span><text:span text:style-name="T30">counters </text:span><text:span text:style-name="T30">unreliable: </text:span><text:span text:style-name="T32">Free</text:span><text:span text:style-name="T30"> </text:span><text:span text:style-name="T30">calculated </text:span><text:span text:style-name="T30">by </text:span><text:span text:style-name="T30">difference</text:span><text:span text:style-name="T30"><text:line-break/></text:span><text:span text:style-name="T32">ReservedV</text:span><text:span text:style-name="T32">Ms</text:span><text:span text:style-name="T30">: </text:span><text:span text:style-name="T30">((vcpus * </text:span><text:span text:style-name="T30">max_freq) </text:span><text:span text:style-name="T30">/ 100.0) * </text:span><text:span text:style-name="T30">vcpu_load_</text:span><text:span text:style-name="T30">factor </text:span><text:span text:style-name="T31">MHz</text:span><text:span text:style-name="T30"><text:line-break/></text:span><text:span text:style-name="T32">Used</text:span><text:span text:style-name="T30"> </text:span><text:span text:style-name="T30">(libvirt): </text:span><text:span text:style-name="T30">kernel_ns / </text:span><text:span text:style-name="T30">(interval * </text:span><text:span text:style-name="T30">1000000) * </text:span><text:span text:style-name="T30">max_freq </text:span><text:span text:style-name="T31">MHz</text:span><text:span text:style-name="T30"> (+ </text:span><text:span text:style-name="T30">iowait_ns </text:span><text:span text:style-name="T30">+ user_ns)</text:span><text:span text:style-name="T30"><text:line-break/></text:span><text:span text:style-name="T30">(libvirt </text:span><text:span text:style-name="T30">“kernel_ns” </text:span><text:span text:style-name="T30">= sys + irq </text:span><text:span text:style-name="T30">+ softirq, </text:span><text:span text:style-name="T30">user = usr </text:span><text:span text:style-name="T30">+ nice)</text:span><text:span text:style-name="T30"><text:line-break/></text:span><text:span text:style-name="T32">Free</text:span><text:span text:style-name="T30"> = </text:span><text:span text:style-name="T30">Total – </text:span><text:span text:style-name="T30">Used </text:span><text:span text:style-name="T31">MHz</text:span><text:span text:style-name="T30"><text:line-break/></text:span><text:span text:style-name="T32">UsedVMs</text:span><text:span text:style-name="T30">: </text:span><text:span text:style-name="T30">(sum_vms</text:span><text:span text:style-name="T30">_cpu_utiliz</text:span><text:span text:style-name="T30">ation * </text:span><text:span text:style-name="T30">max_freq / </text:span><text:span text:style-name="T30">100) </text:span><text:span text:style-name="T31">MHz</text:span><text:span text:style-name="T31"><text:line-break/></text:span><text:span text:style-name="T32">UsedOS </text:span><text:span text:style-name="T30">= </text:span><text:span text:style-name="T30">Used – </text:span><text:span text:style-name="T30">UsedVMs </text:span><text:span text:style-name="T31">MHz</text:span><text:span text:style-name="T30"><text:line-break/></text:span><text:span text:style-name="T32">AvailableV</text:span><text:span text:style-name="T32">Ms</text:span><text:span text:style-name="T30">: Total – </text:span><text:span text:style-name="T30">ReservedV</text:span><text:span text:style-name="T30">Ms – </text:span><text:span text:style-name="T30">UsedOS </text:span><text:span text:style-name="T31">MHz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3"><text:line-break/></text:span><text:span text:style-name="T33"><text:line-break/></text:span><text:span text:style-name="T30"><text:line-break/></text:span><text:span text:style-name="T30"><text:line-break/></text:span><text:span text:style-name="T30"/></text:p>
          </draw:text-box>
        </draw:frame>
        <presentation:notes draw:style-name="dp2">
          <draw:page-thumbnail draw:style-name="gr2" draw:layer="layout" svg:width="18.607cm" svg:height="10.476cm" svg:x="1.491cm" svg:y="2.123cm" draw:page-number="1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>
        <office:forms form:automatic-focus="false" form:apply-design-mode="false"/>
        <draw:custom-shape draw:name="PlaceHolder 25" draw:style-name="gr77" draw:text-style-name="P4" draw:layer="layout" svg:width="21.286cm" svg:height="0.951cm" svg:x="1.271cm" svg:y="0.943cm">
          <text:p text:style-name="P3"><text:span text:style-name="T4">VM statis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26" presentation:style-name="pr1" draw:text-style-name="P2" draw:layer="layout" svg:width="20.586cm" svg:height="10.346cm" svg:x="1.4cm" svg:y="2.354cm" presentation:class="title" presentation:user-transformed="true">
          <draw:text-box>
            <text:p text:style-name="P1"><text:span text:style-name="T30">vms info, </text:span><text:span text:style-name="T30">also </text:span><text:span text:style-name="T30">refetched </text:span><text:span text:style-name="T30">at every </text:span><text:span text:style-name="T30">system_inf</text:span><text:span text:style-name="T30">o_loop</text:span><text:span text:style-name="T30"><text:line-break/></text:span><text:span text:style-name="T30"><text:line-break/></text:span><text:span text:style-name="T30">domain </text:span><text:span text:style-name="T30">info: uuid, </text:span><text:span text:style-name="T30">name, </text:span><text:span text:style-name="T30">runstate</text:span><text:span text:style-name="T30"><text:line-break/></text:span><text:span text:style-name="T30">stats: disk </text:span><text:span text:style-name="T30">capacity, </text:span><text:span text:style-name="T30">allocation, </text:span><text:span text:style-name="T30">physical </text:span><text:span text:style-name="T30">(</text:span><text:span text:style-name="T31">MiB</text:span><text:span text:style-name="T30">), net </text:span><text:span text:style-name="T30">bandwidth </text:span><text:span text:style-name="T30">(</text:span><text:span text:style-name="T31">KiB/s</text:span><text:span text:style-name="T30">),</text:span><text:span text:style-name="T30"><text:line-break/></text:span><text:span text:style-name="T30">vcpus, cpu </text:span><text:span text:style-name="T30">utilization </text:span><text:span text:style-name="T30">(</text:span><text:span text:style-name="T31">% CPU</text:span><text:span text:style-name="T30">) <text:s/>-&gt; </text:span><text:span text:style-name="T30"><text:s/>MHz </text:span><text:span text:style-name="T30">Used, VM </text:span><text:span text:style-name="T30">memory </text:span><text:span text:style-name="T30">capacity </text:span><text:span text:style-name="T30">(/hp), </text:span><text:span text:style-name="T30">“Used” (RS</text:span><text:span text:style-name="T30">S </text:span><text:span text:style-name="T31">MiB</text:span><text:span text:style-name="T30">)</text:span><text:span text:style-name="T30"><text:line-break/></text:span><text:span text:style-name="T27"><text:line-break/></text:span><text:span text:style-name="T27">Some </text:span><text:span text:style-name="T27">stats are </text:span><text:span text:style-name="T27">calculated </text:span><text:span text:style-name="T27">by </text:span><text:span text:style-name="T27">difference </text:span><text:span text:style-name="T27">with </text:span><text:span text:style-name="T27">previous </text:span><text:span text:style-name="T27">loop </text:span><text:span text:style-name="T27">iteration:</text:span><text:span text:style-name="T27"><text:line-break/></text:span><text:span text:style-name="T27"><text:line-break/></text:span><text:span text:style-name="T27"> <text:s text:c="7"/>var </text:span><text:span text:style-name="T27">udelta </text:span><text:span text:style-name="T27">uint64 = </text:span><text:span text:style-name="T27">Counter_d</text:span><text:span text:style-name="T27">elta_uint64</text:span><text:span text:style-name="T27">(vm.cpu_ti</text:span><text:span text:style-name="T27">me, </text:span><text:span text:style-name="T27">old.cpu_ti</text:span><text:span text:style-name="T27">me)</text:span><text:span text:style-name="T27"><text:line-break/></text:span><text:span text:style-name="T27"> <text:s text:c="7"/></text:span><text:span text:style-name="T27">vm.stats.C</text:span><text:span text:style-name="T27">puUtilizati</text:span><text:span text:style-name="T27">on = </text:span><text:span text:style-name="T27">int32((udel</text:span><text:span text:style-name="T27">ta * 100) / </text:span><text:span text:style-name="T27">(uint64(vm</text:span><text:span text:style-name="T27">.Ts - </text:span><text:span text:style-name="T27">old.Ts) * </text:span><text:span text:style-name="T27">1000000))</text:span><text:span text:style-name="T27"><text:line-break/></text:span><text:span text:style-name="T27"><text:line-break/></text:span><text:span text:style-name="T27"> <text:s text:c="7"/></text:span><text:span text:style-name="T27">vm.stats.</text:span><text:span text:style-name="T27">MhzUsed </text:span><text:span text:style-name="T27">= </text:span><text:span text:style-name="T27">vm.stats.C</text:span><text:span text:style-name="T27">puUtilizati</text:span><text:span text:style-name="T27">on * </text:span><text:span text:style-name="T27">int32(imm.</text:span><text:span text:style-name="T27">info.MHz) </text:span><text:span text:style-name="T27">/ 100</text:span><text:span text:style-name="T27"><text:line-break/></text:span><text:span text:style-name="T27"><text:line-break/></text:span><text:span text:style-name="T27"> <text:s text:c="7"/>var </text:span><text:span text:style-name="T27">delta int64 </text:span><text:span text:style-name="T27">= </text:span><text:span text:style-name="T27">Counter_d</text:span><text:span text:style-name="T27">elta_int64(</text:span><text:span text:style-name="T27">vm.net_rx, </text:span><text:span text:style-name="T27">old.net_rx)</text:span><text:span text:style-name="T27"><text:line-break/></text:span><text:span text:style-name="T27"> <text:s text:c="7"/></text:span><text:span text:style-name="T27">vm.stats.N</text:span><text:span text:style-name="T27">etRxBw = </text:span><text:span text:style-name="T27">int32((delt</text:span><text:span text:style-name="T27">a * 1000) / </text:span><text:span text:style-name="T27">((vm.Ts - </text:span><text:span text:style-name="T27">old.Ts) * </text:span><text:span text:style-name="T27">KiB))</text:span><text:span text:style-name="T27"><text:line-break/></text:span><text:span text:style-name="T27"/></text:p>
          </draw:text-box>
        </draw:frame>
        <presentation:notes draw:style-name="dp2">
          <draw:page-thumbnail draw:style-name="gr2" draw:layer="layout" svg:width="18.607cm" svg:height="10.476cm" svg:x="1.491cm" svg:y="2.123cm" draw:page-number="13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_5f_">
        <office:forms form:automatic-focus="false" form:apply-design-mode="false"/>
        <draw:custom-shape draw:name="PlaceHolder 8" draw:style-name="gr78" draw:text-style-name="P4" draw:layer="layout" svg:width="21.286cm" svg:height="0.951cm" svg:x="1.271cm" svg:y="0.943cm">
          <text:p text:style-name="P3"><text:span text:style-name="T4">Locking in Virt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0" presentation:style-name="pr5" draw:text-style-name="P2" draw:layer="layout" svg:width="20.586cm" svg:height="6.158cm" svg:x="1.4cm" svg:y="2.354cm" presentation:class="title" presentation:user-transformed="true">
          <draw:text-box>
            <text:p text:style-name="P1"><text:span text:style-name="T27">We </text:span><text:span text:style-name="T27">currently </text:span><text:span text:style-name="T27">have a </text:span><text:span text:style-name="T27">distributed </text:span><text:span text:style-name="T27">cooperativ</text:span><text:span text:style-name="T27">e locking, </text:span><text:span text:style-name="T27">used to </text:span><text:span text:style-name="T27">govern </text:span><text:span text:style-name="T27">access to </text:span><text:span text:style-name="T34">managed</text:span><text:span text:style-name="T27"> </text:span><text:span text:style-name="T27">storage </text:span><text:span text:style-name="T27">resources </text:span><text:span text:style-name="T27">(“disks”, ie </text:span><text:span text:style-name="T27">virtual </text:span><text:span text:style-name="T27">disks on </text:span><text:span text:style-name="T27">NFS, or </text:span><text:span text:style-name="T27">LUN </text:span><text:span text:style-name="T27">devices).</text:span><text:span text:style-name="T27"><text:line-break/></text:span><text:span text:style-name="T27"><text:line-break/></text:span><text:span text:style-name="T27">Disks in </text:span><text:span text:style-name="T27">VirtX are </text:span><text:span text:style-name="T34">managed</text:span><text:span text:style-name="T27"> </text:span><text:span text:style-name="T27">or </text:span><text:span text:style-name="T34">unmanage</text:span><text:span text:style-name="T34">d</text:span><text:span text:style-name="T27">. </text:span><text:span text:style-name="T27">Unmanage</text:span><text:span text:style-name="T27">d disks are </text:span><text:span text:style-name="T27">not locked </text:span><text:span text:style-name="T27">by VirtX.</text:span><text:span text:style-name="T27"><text:line-break/></text:span><text:span text:style-name="T27"><text:line-break/></text:span><text:span text:style-name="T27">For </text:span><text:span text:style-name="T27">Managed </text:span><text:span text:style-name="T27">Disks the </text:span><text:span text:style-name="T27">goals are:</text:span><text:span text:style-name="T27"><text:line-break/></text:span><text:span text:style-name="T27"><text:line-break/></text:span><text:span text:style-name="T32">libvirt and </text:span><text:span text:style-name="T32">virtxd </text:span><text:span text:style-name="T32">cooperatio</text:span><text:span text:style-name="T32">n</text:span><text:span text:style-name="T30">: libvirt </text:span><text:span text:style-name="T30">and virtxd </text:span><text:span text:style-name="T30">need to </text:span><text:span text:style-name="T30">coordinate </text:span><text:span text:style-name="T30">so they are </text:span><text:span text:style-name="T30">both </text:span><text:span text:style-name="T30">aware of </text:span><text:span text:style-name="T30">the state </text:span><text:span text:style-name="T30">of disks </text:span><text:span text:style-name="T30">and </text:span><text:span text:style-name="T30">whether </text:span><text:span text:style-name="T30">they are </text:span><text:span text:style-name="T30">currently in </text:span><text:span text:style-name="T30">use </text:span><text:span text:style-name="T30">(locked).</text:span><text:span text:style-name="T30"><text:line-break/></text:span><text:span text:style-name="T30"><text:line-break/></text:span><text:span text:style-name="T32">virtxd </text:span><text:span text:style-name="T32">(de-)provis</text:span><text:span text:style-name="T32">ioning</text:span><text:span text:style-name="T30">: </text:span><text:span text:style-name="T30">VirtX takes </text:span><text:span text:style-name="T30">care of </text:span><text:span text:style-name="T30">preparing </text:span><text:span text:style-name="T30">a disk for </text:span><text:span text:style-name="T30">use, </text:span><text:span text:style-name="T30">creating it </text:span><text:span text:style-name="T30">if </text:span><text:span text:style-name="T30">necessary </text:span><text:span text:style-name="T30">or taking </text:span><text:span text:style-name="T30">over an </text:span><text:span text:style-name="T30">existing </text:span><text:span text:style-name="T30">disk. When </text:span><text:span text:style-name="T30">a VM is </text:span><text:span text:style-name="T30">deleted, </text:span><text:span text:style-name="T30">VirtX can </text:span><text:span text:style-name="T30">optionally </text:span><text:span text:style-name="T30">also de-</text:span><text:span text:style-name="T30">provision </text:span><text:span text:style-name="T30">the </text:span><text:span text:style-name="T30">managed </text:span><text:span text:style-name="T30">disks.</text:span><text:span text:style-name="T30"><text:line-break/></text:span><text:span text:style-name="T30"><text:line-break/></text:span><text:span text:style-name="T34">VM disk </text:span><text:span text:style-name="T34">ownership</text:span><text:span text:style-name="T27">: </text:span><text:span text:style-name="T27">each VM </text:span><text:span text:style-name="T27">fully owns </text:span><text:span text:style-name="T27">its </text:span><text:span text:style-name="T27">managed </text:span><text:span text:style-name="T27">disks. This </text:span><text:span text:style-name="T27">means </text:span><text:span text:style-name="T27">that two </text:span><text:span text:style-name="T27">VMs </text:span><text:span text:style-name="T27">cannot use </text:span><text:span text:style-name="T27">the same </text:span><text:span text:style-name="T27">managed </text:span><text:span text:style-name="T27">disk, even </text:span><text:span text:style-name="T27">if the other </text:span><text:span text:style-name="T27">VM is </text:span><text:span text:style-name="T27">shutdown. </text:span><text:span text:style-name="T27">No “ping-</text:span><text:span text:style-name="T27">pong”.</text:span><text:span text:style-name="T27"><text:line-break/></text:span><text:span text:style-name="T27"><text:line-break/></text:span><text:span text:style-name="T27"/></text:p>
          </draw:text-box>
        </draw:frame>
        <presentation:notes draw:style-name="dp2">
          <draw:page-thumbnail draw:style-name="gr2" draw:layer="layout" svg:width="18.607cm" svg:height="10.476cm" svg:x="1.49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_5f_">
        <office:forms form:automatic-focus="false" form:apply-design-mode="false"/>
        <draw:custom-shape draw:name="PlaceHolder 46" draw:style-name="gr79" draw:text-style-name="P4" draw:layer="layout" svg:width="21.286cm" svg:height="0.951cm" svg:x="1.271cm" svg:y="0.943cm">
          <text:p text:style-name="P3"><text:span text:style-name="T4">Locking in VirtX: libvirt coop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49" presentation:style-name="pr5" draw:text-style-name="P2" draw:layer="layout" svg:width="20.586cm" svg:height="10.346cm" svg:x="1.4cm" svg:y="2.354cm" presentation:class="title" presentation:user-transformed="true">
          <draw:text-box>
            <text:p text:style-name="P1"><text:span text:style-name="T27">libvirt does </text:span><text:span text:style-name="T27">not offer a </text:span><text:span text:style-name="T27">public </text:span><text:span text:style-name="T27">locking </text:span><text:span text:style-name="T27">API.</text:span><text:span text:style-name="T27"><text:line-break/></text:span><text:span text:style-name="T27">It has an </text:span><text:span text:style-name="T27">internal </text:span><text:span text:style-name="T27">API with </text:span><text:span text:style-name="T27">two drivers </text:span><text:span text:style-name="T27">(lockd, </text:span><text:span text:style-name="T27">sanlock). </text:span><text:span text:style-name="T27">Lockd is </text:span><text:span text:style-name="T27">for internal </text:span><text:span text:style-name="T27">use </text:span><text:span text:style-name="T27">(virtlockd).</text:span><text:span text:style-name="T27"><text:line-break/></text:span><text:span text:style-name="T27"><text:line-break/></text:span><text:span text:style-name="T27">By using </text:span><text:span text:style-name="T27">sanlock </text:span><text:span text:style-name="T27">referring to </text:span><text:span text:style-name="T27">the same </text:span><text:span text:style-name="T27">lockspace </text:span><text:span text:style-name="T27">and </text:span><text:span text:style-name="T27">resources </text:span><text:span text:style-name="T27">we solve </text:span><text:span text:style-name="T27">the </text:span><text:span text:style-name="T27">problem </text:span><text:span text:style-name="T27">for the </text:span><text:span text:style-name="T27">major part, </text:span><text:span text:style-name="T27">with some </text:span><text:span text:style-name="T27">edge case </text:span><text:span text:style-name="T27">caveats.</text:span><text:span text:style-name="T27"><text:line-break/></text:span><text:span text:style-name="T27"><text:line-break/></text:span><text:span text:style-name="T27">VirtX will </text:span><text:span text:style-name="T27">create a </text:span><text:span text:style-name="T27">resource </text:span><text:span text:style-name="T27">file (paxos </text:span><text:span text:style-name="T27">lease file) </text:span><text:span text:style-name="T27">any time it </text:span><text:span text:style-name="T27">provisions </text:span><text:span text:style-name="T27">a new </text:span><text:span text:style-name="T27">managed </text:span><text:span text:style-name="T27">disk, and it </text:span><text:span text:style-name="T27">will delete </text:span><text:span text:style-name="T27">the </text:span><text:span text:style-name="T27">resource </text:span><text:span text:style-name="T27">file when it </text:span><text:span text:style-name="T27">de-</text:span><text:span text:style-name="T27">provisions </text:span><text:span text:style-name="T27">the </text:span><text:span text:style-name="T27">managed </text:span><text:span text:style-name="T27">disk.</text:span><text:span text:style-name="T27"><text:line-break/></text:span><text:span text:style-name="T27"><text:line-break/></text:span><text:span text:style-name="T27">VirtX will </text:span><text:span text:style-name="T27">add </text:span><text:span text:style-name="T27">&lt;lease&gt; </text:span><text:span text:style-name="T27">elements </text:span><text:span text:style-name="T27">to the </text:span><text:span text:style-name="T27">libvirt XML </text:span><text:span text:style-name="T27">definition </text:span><text:span text:style-name="T27">of the VM </text:span><text:span text:style-name="T27">referring to </text:span><text:span text:style-name="T27">the correct </text:span><text:span text:style-name="T27">lockspace, </text:span><text:span text:style-name="T27">resource </text:span><text:span text:style-name="T27">key and </text:span><text:span text:style-name="T27">resource </text:span><text:span text:style-name="T27">path, so </text:span><text:span text:style-name="T27">that libvirt </text:span><text:span text:style-name="T27">can </text:span><text:span text:style-name="T27">acquire </text:span><text:span text:style-name="T27">the lease </text:span><text:span text:style-name="T27">on the </text:span><text:span text:style-name="T27">resource.</text:span><text:span text:style-name="T27"><text:line-break/></text:span><text:span text:style-name="T27"><text:line-break/></text:span><text:span text:style-name="T27">This way, </text:span><text:span text:style-name="T27">VirtX and </text:span><text:span text:style-name="T27">libvirt can </text:span><text:span text:style-name="T27">coordinate </text:span><text:span text:style-name="T27">on when a </text:span><text:span text:style-name="T27">resource is </text:span><text:span text:style-name="T27">accessible</text:span><text:span text:style-name="T27">.</text:span><text:span text:style-name="T27"><text:line-break/></text:span><text:span text:style-name="T27"/></text:p>
          </draw:text-box>
        </draw:frame>
        <presentation:notes draw:style-name="dp2">
          <draw:page-thumbnail draw:style-name="gr2" draw:layer="layout" svg:width="18.607cm" svg:height="10.476cm" svg:x="1.49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_5f_">
        <office:forms form:automatic-focus="false" form:apply-design-mode="false"/>
        <draw:custom-shape draw:name="PlaceHolder 50" draw:style-name="gr80" draw:text-style-name="P4" draw:layer="layout" svg:width="21.286cm" svg:height="0.951cm" svg:x="1.271cm" svg:y="0.943cm">
          <text:p text:style-name="P3"><text:span text:style-name="T4">Locking in VirtX: initi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51" presentation:style-name="pr5" draw:text-style-name="P2" draw:layer="layout" svg:width="20.586cm" svg:height="10.346cm" svg:x="1.4cm" svg:y="2.354cm" presentation:class="title" presentation:user-transformed="true">
          <draw:text-box>
            <text:p text:style-name="P1"><text:span text:style-name="T27">On startup, </text:span><text:span text:style-name="T27">virtxd </text:span><text:span text:style-name="T27">checks if </text:span><text:span text:style-name="T27">the </text:span><text:span text:style-name="T27">lockspace </text:span><text:span text:style-name="T27">delta lease </text:span><text:span text:style-name="T27">file is </text:span><text:span text:style-name="T27">already </text:span><text:span text:style-name="T27">existing </text:span><text:span text:style-name="T27">and </text:span><text:span text:style-name="T27">properly </text:span><text:span text:style-name="T27">initialized; </text:span><text:span text:style-name="T27">if not, it will </text:span><text:span text:style-name="T27">create a </text:span><text:span text:style-name="T27">temporary </text:span><text:span text:style-name="T27">directory, </text:span><text:span text:style-name="T27">fully </text:span><text:span text:style-name="T27">initialize </text:span><text:span text:style-name="T27">the delta </text:span><text:span text:style-name="T27">lease file, </text:span><text:span text:style-name="T27">and then </text:span><text:span text:style-name="T27">attempt a </text:span><text:span text:style-name="T27">rename </text:span><text:span text:style-name="T27">operation </text:span><text:span text:style-name="T27">to the </text:span><text:span text:style-name="T27">empty </text:span><text:span text:style-name="T27">final </text:span><text:span text:style-name="T27">destinatio</text:span><text:span text:style-name="T27">n directory, </text:span><text:span text:style-name="T27">so that </text:span><text:span text:style-name="T27">parallel </text:span><text:span text:style-name="T27">attempts </text:span><text:span text:style-name="T27">to initialize </text:span><text:span text:style-name="T27">are </text:span><text:span text:style-name="T27">captured </text:span><text:span text:style-name="T27">by EEXIST </text:span><text:span text:style-name="T27">or </text:span><text:span text:style-name="T27">ENOTEMP</text:span><text:span text:style-name="T27">TY on the </text:span><text:span text:style-name="T27">rename.</text:span><text:span text:style-name="T27"><text:line-break/></text:span><text:span text:style-name="T27"><text:line-break/></text:span><text:span text:style-name="T27">Then it </text:span><text:span text:style-name="T27">instructs </text:span><text:span text:style-name="T27">the local </text:span><text:span text:style-name="T27">sanlock </text:span><text:span text:style-name="T27">daemon to </text:span><text:span text:style-name="T27">join the </text:span><text:span text:style-name="T27">lockspace </text:span><text:span text:style-name="T27">if not </text:span><text:span text:style-name="T27">already </text:span><text:span text:style-name="T27">joined, </text:span><text:span text:style-name="T27">identifying </text:span><text:span text:style-name="T27">the host </text:span><text:span text:style-name="T27">with a </text:span><text:span text:style-name="T27">unique </text:span><text:span text:style-name="T27">host_id to </text:span><text:span text:style-name="T27">be marked </text:span><text:span text:style-name="T27">in the </text:span><text:span text:style-name="T27">shared </text:span><text:span text:style-name="T27">delta lease </text:span><text:span text:style-name="T27">file.</text:span><text:span text:style-name="T27"><text:line-break/></text:span><text:span text:style-name="T27"><text:line-break/></text:span><text:span text:style-name="T27">This </text:span><text:span text:style-name="T27">host_id </text:span><text:span text:style-name="T27">can be </text:span><text:span text:style-name="T27">mapped </text:span><text:span text:style-name="T27">initially </text:span><text:span text:style-name="T27">from the </text:span><text:span text:style-name="T27">host uuid </text:span><text:span text:style-name="T27">to a </text:span><text:span text:style-name="T27">(1-2000) </text:span><text:span text:style-name="T27">host_id, </text:span><text:span text:style-name="T27">and on </text:span><text:span text:style-name="T27">collision a </text:span><text:span text:style-name="T27">linear </text:span><text:span text:style-name="T27">search of </text:span><text:span text:style-name="T27">the space </text:span><text:span text:style-name="T27">is done to </text:span><text:span text:style-name="T27">find a free </text:span><text:span text:style-name="T27">slot. Once </text:span><text:span text:style-name="T27">the </text:span><text:span text:style-name="T27">lockspace </text:span><text:span text:style-name="T27">is </text:span><text:span text:style-name="T27">successful</text:span><text:span text:style-name="T27">ly joined, </text:span><text:span text:style-name="T27">the host_id </text:span><text:span text:style-name="T27">is cached </text:span><text:span text:style-name="T27">in vmreg </text:span><text:span text:style-name="T27">for future </text:span><text:span text:style-name="T27">use. It can </text:span><text:span text:style-name="T27">also be </text:span><text:span text:style-name="T27">“manually” </text:span><text:span text:style-name="T27">configured </text:span><text:span text:style-name="T27">in the </text:span><text:span text:style-name="T27">cache if </text:span><text:span text:style-name="T27">desired.</text:span><text:span text:style-name="T27"><text:line-break/></text:span><text:span text:style-name="T27"><text:line-break/></text:span><text:span text:style-name="T27">New </text:span><text:span text:style-name="T27">resource </text:span><text:span text:style-name="T27">creation </text:span><text:span text:style-name="T27">(paxos </text:span><text:span text:style-name="T27">lease file) </text:span><text:span text:style-name="T27">use the </text:span><text:span text:style-name="T27">same </text:span><text:span text:style-name="T27">algorithm </text:span><text:span text:style-name="T27">with the </text:span><text:span text:style-name="T27">final </text:span><text:span text:style-name="T27">rename as </text:span><text:span text:style-name="T27">per delta </text:span><text:span text:style-name="T27">lease files, </text:span><text:span text:style-name="T27">to ensure </text:span><text:span text:style-name="T27">that a </text:span><text:span text:style-name="T27">resource </text:span><text:span text:style-name="T27">file is </text:span><text:span text:style-name="T27">either </text:span><text:span text:style-name="T27">visible and </text:span><text:span text:style-name="T27">fully </text:span><text:span text:style-name="T27">initialized, </text:span><text:span text:style-name="T27">or not </text:span><text:span text:style-name="T27">visible </text:span><text:span text:style-name="T27">(never </text:span><text:span text:style-name="T27">visible with </text:span><text:span text:style-name="T27">partly-</text:span><text:span text:style-name="T27">initialized </text:span><text:span text:style-name="T27">contents).</text:span><text:span text:style-name="T27"><text:line-break/></text:span><text:span text:style-name="T27"><text:line-break/></text:span><text:span text:style-name="T27"/></text:p>
          </draw:text-box>
        </draw:frame>
        <presentation:notes draw:style-name="dp2">
          <draw:page-thumbnail draw:style-name="gr2" draw:layer="layout" svg:width="18.607cm" svg:height="10.476cm" svg:x="1.49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_5f_">
        <office:forms form:automatic-focus="false" form:apply-design-mode="false"/>
        <draw:custom-shape draw:name="PlaceHolder 52" draw:style-name="gr81" draw:text-style-name="P4" draw:layer="layout" svg:width="21.286cm" svg:height="0.951cm" svg:x="1.271cm" svg:y="0.943cm">
          <text:p text:style-name="P3"><text:span text:style-name="T4">Locking in VirtX: provisioning and de-provisio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95" presentation:style-name="pr5" draw:text-style-name="P2" draw:layer="layout" svg:width="20.586cm" svg:height="10.346cm" svg:x="1.4cm" svg:y="2.354cm" presentation:class="title" presentation:user-transformed="true">
          <draw:text-box>
            <text:p text:style-name="P1"><text:span text:style-name="T27">When a </text:span><text:span text:style-name="T27">VM is </text:span><text:span text:style-name="T27">newly </text:span><text:span text:style-name="T27">created or </text:span><text:span text:style-name="T27">updated, </text:span><text:span text:style-name="T27">all disks </text:span><text:span text:style-name="T27">that are </text:span><text:span text:style-name="T27">marked as </text:span><text:span text:style-name="T27">MANAGED </text:span><text:span text:style-name="T27">go through </text:span><text:span text:style-name="T27">a </text:span><text:span text:style-name="T27">provisionin</text:span><text:span text:style-name="T27">g step.</text:span><text:span text:style-name="T27"><text:line-break/></text:span><text:span text:style-name="T27"><text:line-break/></text:span><text:span text:style-name="T27">a resource </text:span><text:span text:style-name="T27">is created </text:span><text:span text:style-name="T27">and </text:span><text:span text:style-name="T27">acquired </text:span><text:span text:style-name="T27">for each of </text:span><text:span text:style-name="T27">those </text:span><text:span text:style-name="T27">disks, and </text:span><text:span text:style-name="T27">is </text:span><text:span text:style-name="T27">initialized </text:span><text:span text:style-name="T27">with a LVB </text:span><text:span text:style-name="T27">(lock value </text:span><text:span text:style-name="T27">block) </text:span><text:span text:style-name="T27">containing </text:span><text:span text:style-name="T27">the UUID </text:span><text:span text:style-name="T27">of the </text:span><text:span text:style-name="T27">owning </text:span><text:span text:style-name="T27">VM.</text:span><text:span text:style-name="T27"><text:line-break/></text:span><text:span text:style-name="T27"><text:line-break/></text:span><text:span text:style-name="T27">For virtual </text:span><text:span text:style-name="T27">disks, VirtX </text:span><text:span text:style-name="T27">will </text:span><text:span text:style-name="T27">optionally </text:span><text:span text:style-name="T27">create a </text:span><text:span text:style-name="T27">new disk </text:span><text:span text:style-name="T27">(qemu-img </text:span><text:span text:style-name="T27">create), .q</text:span><text:span text:style-name="T27">cow2 </text:span><text:span text:style-name="T27">or .raw are </text:span><text:span text:style-name="T27">supported, </text:span><text:span text:style-name="T27">or it can </text:span><text:span text:style-name="T27">claim </text:span><text:span text:style-name="T27">existing </text:span><text:span text:style-name="T27">disks. The </text:span><text:span text:style-name="T27">disk can </text:span><text:span text:style-name="T27">be marked </text:span><text:span text:style-name="T27">as “thin” or </text:span><text:span text:style-name="T27">“thick” and </text:span><text:span text:style-name="T27">will be </text:span><text:span text:style-name="T27">provisione</text:span><text:span text:style-name="T27">d </text:span><text:span text:style-name="T27">accordingl</text:span><text:span text:style-name="T27">y, or for </text:span><text:span text:style-name="T27">existing </text:span><text:span text:style-name="T27">disks, the </text:span><text:span text:style-name="T27">provisionin</text:span><text:span text:style-name="T27">g mode is </text:span><text:span text:style-name="T27">detected.</text:span><text:span text:style-name="T27"><text:line-break/></text:span><text:span text:style-name="T27"><text:line-break/></text:span><text:span text:style-name="T27">For LUNs, </text:span><text:span text:style-name="T27">VirtX will </text:span><text:span text:style-name="T27">attempt to </text:span><text:span text:style-name="T27">efficiently </text:span><text:span text:style-name="T27">clear the </text:span><text:span text:style-name="T27">disk, using </text:span><text:span text:style-name="T27">blkdiscard </text:span><text:span text:style-name="T27">if </text:span><text:span text:style-name="T27">supported, </text:span><text:span text:style-name="T27">or wipefs </text:span><text:span text:style-name="T27">and dd. </text:span><text:span text:style-name="T27">The </text:span><text:span text:style-name="T27">provisionin</text:span><text:span text:style-name="T27">g mode </text:span><text:span text:style-name="T27">cannot be </text:span><text:span text:style-name="T27">reliably set </text:span><text:span text:style-name="T27">and </text:span><text:span text:style-name="T27">currently </text:span><text:span text:style-name="T27">not even </text:span><text:span text:style-name="T27">detected </text:span><text:span text:style-name="T27">from VirtX </text:span><text:span text:style-name="T27">in all cases </text:span><text:span text:style-name="T27">(* </text:span><text:span text:style-name="T27">improvem</text:span><text:span text:style-name="T27">ent).</text:span><text:span text:style-name="T27"><text:line-break/></text:span><text:span text:style-name="T27"><text:line-break/></text:span><text:span text:style-name="T27">After the </text:span><text:span text:style-name="T27">disk is fully </text:span><text:span text:style-name="T27">provisione</text:span><text:span text:style-name="T27">d, the </text:span><text:span text:style-name="T27">resource </text:span><text:span text:style-name="T27">lease will </text:span><text:span text:style-name="T27">be </text:span><text:span text:style-name="T27">released.</text:span><text:span text:style-name="T27"><text:line-break/></text:span><text:span text:style-name="T27">For de-</text:span><text:span text:style-name="T27">provisionin</text:span><text:span text:style-name="T27">g, it is all </text:span><text:span text:style-name="T27">very </text:span><text:span text:style-name="T27">similar, </text:span><text:span text:style-name="T27">with the </text:span><text:span text:style-name="T27">disk being </text:span><text:span text:style-name="T27">optionally </text:span><text:span text:style-name="T27">deleted / </text:span><text:span text:style-name="T27">wiped, and </text:span><text:span text:style-name="T27">the </text:span><text:span text:style-name="T27">resource </text:span><text:span text:style-name="T27">lease file </text:span><text:span text:style-name="T27">deleted, all </text:span><text:span text:style-name="T27">while </text:span><text:span text:style-name="T27">holding the </text:span><text:span text:style-name="T27">lease.</text:span></text:p>
          </draw:text-box>
        </draw:frame>
        <presentation:notes draw:style-name="dp2">
          <draw:page-thumbnail draw:style-name="gr2" draw:layer="layout" svg:width="18.607cm" svg:height="10.476cm" svg:x="1.49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_5f_">
        <office:forms form:automatic-focus="false" form:apply-design-mode="false"/>
        <draw:custom-shape draw:name="PlaceHolder 100" draw:style-name="gr82" draw:text-style-name="P4" draw:layer="layout" svg:width="21.286cm" svg:height="0.951cm" svg:x="1.271cm" svg:y="0.943cm">
          <text:p text:style-name="P3"><text:span text:style-name="T4">Locking in VirtX: VM disk owners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01" presentation:style-name="pr5" draw:text-style-name="P2" draw:layer="layout" svg:width="20.586cm" svg:height="10.346cm" svg:x="1.4cm" svg:y="2.354cm" presentation:class="title" presentation:user-transformed="true">
          <draw:text-box>
            <text:p text:style-name="P1"><text:span text:style-name="T27">The LVB of </text:span><text:span text:style-name="T27">each </text:span><text:span text:style-name="T27">resource </text:span><text:span text:style-name="T27">file </text:span><text:span text:style-name="T27">contains </text:span><text:span text:style-name="T27">the UUID </text:span><text:span text:style-name="T27">of the </text:span><text:span text:style-name="T27">owning </text:span><text:span text:style-name="T27">VM.</text:span><text:span text:style-name="T27"><text:line-break/></text:span><text:span text:style-name="T27"><text:line-break/></text:span><text:span text:style-name="T27">This is </text:span><text:span text:style-name="T27">checked </text:span><text:span text:style-name="T35">under </text:span><text:span text:style-name="T35">lease</text:span><text:span text:style-name="T27"> each </text:span><text:span text:style-name="T27">time VirtX </text:span><text:span text:style-name="T27">attempts </text:span><text:span text:style-name="T27">to acquire </text:span><text:span text:style-name="T27">the lease, </text:span><text:span text:style-name="T27">and if the </text:span><text:span text:style-name="T27">UUID does </text:span><text:span text:style-name="T27">not match </text:span><text:span text:style-name="T27">the VM for </text:span><text:span text:style-name="T27">which it is </text:span><text:span text:style-name="T27">executing </text:span><text:span text:style-name="T27">the action, </text:span><text:span text:style-name="T27">it will </text:span><text:span text:style-name="T27">immediate</text:span><text:span text:style-name="T27">ly fail and </text:span><text:span text:style-name="T27">release </text:span><text:span text:style-name="T27">the lease.</text:span><text:span text:style-name="T27"><text:line-break/></text:span><text:span text:style-name="T27"><text:line-break/></text:span><text:span text:style-name="T27">This </text:span><text:span text:style-name="T27">makes it </text:span><text:span text:style-name="T27">possible to </text:span><text:span text:style-name="T27">implement </text:span><text:span text:style-name="T27">the </text:span><text:span text:style-name="T27">ownership </text:span><text:span text:style-name="T27">concept, </text:span><text:span text:style-name="T27">and also </text:span><text:span text:style-name="T27">helps </text:span><text:span text:style-name="T27">provide </text:span><text:span text:style-name="T27">better </text:span><text:span text:style-name="T27">error </text:span><text:span text:style-name="T27">messages </text:span><text:span text:style-name="T27">for </text:span><text:span text:style-name="T27">problem </text:span><text:span text:style-name="T27">solving </text:span><text:span text:style-name="T27">(“cannot </text:span><text:span text:style-name="T27">acquire </text:span><text:span text:style-name="T27">lease: disk </text:span><text:span text:style-name="T27">is owned </text:span><text:span text:style-name="T27">by VM </text:span><text:span text:style-name="T27">xxxxxx”).</text:span><text:span text:style-name="T27"><text:line-break/></text:span><text:span text:style-name="T27"><text:line-break/></text:span><text:span text:style-name="T27">This </text:span><text:span text:style-name="T27">concept is </text:span><text:span text:style-name="T27">not </text:span><text:span text:style-name="T27">present in </text:span><text:span text:style-name="T27">libvirt.</text:span><text:span text:style-name="T27"><text:line-break/></text:span><text:span text:style-name="T27"><text:line-break/></text:span><text:span text:style-name="T27">If we </text:span><text:span text:style-name="T27">create or </text:span><text:span text:style-name="T27">update a </text:span><text:span text:style-name="T27">VM in VirtX </text:span><text:span text:style-name="T27">with the </text:span><text:span text:style-name="T27">same </text:span><text:span text:style-name="T27">managed </text:span><text:span text:style-name="T27">disk </text:span><text:span text:style-name="T27">owned by </text:span><text:span text:style-name="T27">another </text:span><text:span text:style-name="T27">VM we </text:span><text:span text:style-name="T27">catch the </text:span><text:span text:style-name="T27">issue </text:span><text:span text:style-name="T27">there, so it </text:span><text:span text:style-name="T27">should not </text:span><text:span text:style-name="T27">be a </text:span><text:span text:style-name="T27">problem in </text:span><text:span text:style-name="T27">most </text:span><text:span text:style-name="T27">cases, as </text:span><text:span text:style-name="T27">long as </text:span><text:span text:style-name="T27">any </text:span><text:span text:style-name="T27">access to </text:span><text:span text:style-name="T27">libvirt is </text:span><text:span text:style-name="T27">mediated </text:span><text:span text:style-name="T27">by VirtX. </text:span><text:span text:style-name="T27">But having </text:span><text:span text:style-name="T27">libvirt </text:span><text:span text:style-name="T27">native </text:span><text:span text:style-name="T27">support </text:span><text:span text:style-name="T27">would </text:span><text:span text:style-name="T27">make it </text:span><text:span text:style-name="T27">more </text:span><text:span text:style-name="T27">reliable.</text:span></text:p>
          </draw:text-box>
        </draw:frame>
        <presentation:notes draw:style-name="dp2">
          <draw:page-thumbnail draw:style-name="gr2" draw:layer="layout" svg:width="18.607cm" svg:height="10.476cm" svg:x="1.49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1">
        <office:forms form:automatic-focus="false" form:apply-design-mode="false"/>
        <draw:frame draw:name="PlaceHolder 14" presentation:style-name="pr1" draw:text-style-name="P2" draw:layer="layout" svg:width="20.586cm" svg:height="6.158cm" svg:x="1.4cm" svg:y="2.354cm" presentation:class="title" presentation:user-transformed="true">
          <draw:text-box>
            <text:p text:style-name="P1"><text:span text:style-name="T36"><text:a xlink:href="https://github.com/openSUSE/virtx" xlink:type="simple">https://github.com/openSUSE/virtx</text:a></text:span><text:span text:style-name="T30"><text:s/>- </text:span><text:span text:style-name="T30">OpenSUS</text:span><text:span text:style-name="T30">E public </text:span><text:span text:style-name="T30">project</text:span><text:span text:style-name="T27"><text:line-break/></text:span><text:span text:style-name="T27"><text:line-break/></text:span><text:span text:style-name="T27">API still </text:span><text:span text:style-name="T27">unstable. </text:span><text:span text:style-name="T30">Some </text:span><text:span text:style-name="T30">immediat</text:span><text:span text:style-name="T30">ely </text:span><text:span text:style-name="T30">actionabl</text:span><text:span text:style-name="T30">e missing </text:span><text:span text:style-name="T30">items:</text:span><text:span text:style-name="T30"><text:line-break/></text:span><text:span text:style-name="T30"><text:line-break/></text:span><text:span text:style-name="T30">- test </text:span><text:span text:style-name="T30">infrastruc</text:span><text:span text:style-name="T30">ture </text:span><text:span text:style-name="T30">(mainly </text:span><text:span text:style-name="T30">to avoid </text:span><text:span text:style-name="T30">regressio</text:span><text:span text:style-name="T30">ns) - </text:span><text:span text:style-name="T30">ongoing</text:span><text:span text:style-name="T30"><text:line-break/></text:span><text:span text:style-name="T30">- better </text:span><text:span text:style-name="T30">networki</text:span><text:span text:style-name="T30">ng (vlan) </text:span><text:span text:style-name="T30">support</text:span><text:span text:style-name="T27"><text:line-break/></text:span><text:span text:style-name="T27"><text:line-break/></text:span><text:span text:style-name="T30">- Gold </text:span><text:span text:style-name="T30">Images </text:span><text:span text:style-name="T30">support </text:span><text:span text:style-name="T30">of some </text:span><text:span text:style-name="T30">kind</text:span><text:span text:style-name="T27"><text:line-break/></text:span><text:span text:style-name="T30">- better </text:span><text:span text:style-name="T30">live </text:span><text:span text:style-name="T30">migration </text:span><text:span text:style-name="T30">statistics</text:span><text:span text:style-name="T30"><text:line-break/></text:span><text:span text:style-name="T30">- security </text:span><text:span text:style-name="T30">review, </text:span><text:span text:style-name="T30">API </text:span><text:span text:style-name="T30">security</text:span><text:span text:style-name="T30"><text:line-break/></text:span><text:span text:style-name="T30">- VM </text:span><text:span text:style-name="T30">resource </text:span><text:span text:style-name="T30">reservati</text:span><text:span text:style-name="T30">on/limits </text:span><text:span text:style-name="T30">and </text:span><text:span text:style-name="T30">enforce</text:span><text:span text:style-name="T30">ment</text:span><text:span text:style-name="T30"><text:line-break/></text:span><text:span text:style-name="T30">- console </text:span><text:span text:style-name="T30">access </text:span><text:span text:style-name="T30">via API </text:span><text:span text:style-name="T30">(text, </text:span><text:span text:style-name="T30">vnc)</text:span><text:span text:style-name="T30"><text:line-break/></text:span><text:span text:style-name="T30"><text:line-break/></text:span><text:span text:style-name="T37">- minimal </text:span><text:span text:style-name="T37">failover </text:span><text:span text:style-name="T37">and </text:span><text:span text:style-name="T37">fencing </text:span><text:span text:style-name="T37">support </text:span><text:span text:style-name="T37">on host </text:span><text:span text:style-name="T37">failure</text:span><text:span text:style-name="T38"><text:line-break/></text:span><text:span text:style-name="T37">- Some </text:span><text:span text:style-name="T37">external </text:span><text:span text:style-name="T37">UI </text:span><text:span text:style-name="T37">(maybe a </text:span><text:span text:style-name="T37">cockpit </text:span><text:span text:style-name="T37">plugin)?</text:span><text:span text:style-name="T37"><text:line-break/></text:span><text:span text:style-name="T37">- VM </text:span><text:span text:style-name="T37">import </text:span><text:span text:style-name="T37">jobs </text:span><text:span text:style-name="T37">(from </text:span><text:span text:style-name="T37">VMWare, </text:span><text:span text:style-name="T37">other </text:span><text:span text:style-name="T37">libvirt/QE</text:span><text:span text:style-name="T37">MU </text:span><text:span text:style-name="T37">platform</text:span><text:span text:style-name="T37">s?)</text:span><text:span text:style-name="T37"><text:line-break/></text:span><text:span text:style-name="T38"><text:line-break/></text:span><text:span text:style-name="T38"><text:line-break/></text:span><text:span text:style-name="T37"> </text:span><text:span text:style-name="T38"><text:line-break/></text:span><text:span text:style-name="T38"><text:line-break/></text:span><text:span text:style-name="T38"><text:line-break/></text:span><text:span text:style-name="T39"><text:line-break/></text:span><text:span text:style-name="T39"/></text:p>
          </draw:text-box>
        </draw:frame>
        <draw:custom-shape draw:name="PlaceHolder 13" draw:style-name="gr83" draw:text-style-name="P4" draw:layer="layout" svg:width="21.286cm" svg:height="0.951cm" svg:x="1.271cm" svg:y="0.943cm">
          <text:p text:style-name="P3"><text:span text:style-name="T4">Imple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07cm" svg:height="10.476cm" svg:x="1.49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/>
    <style:font-face style:name="Roboto" svg:font-family="Roboto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Times New Roman" svg:font-family="'Times New Roman'" style:font-pitch="variable"/>
    <style:font-face style:name="Times New Roman1" svg:font-family="'Times New Roman'"/>
    <style:font-face style:name="Work Sans Light" svg:font-family="'Work Sans Light'" style:font-pitch="variable"/>
    <style:font-face style:name="Work Sans Light1" svg:font-family="'Work Sans Light'"/>
    <style:font-face style:name="Work Sans Medium" svg:font-family="'Work Sans Medium'" style:font-pitch="variable"/>
    <style:font-face style:name="Work Sans Medium1" svg:font-family="'Work Sans Medium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Dash" draw:style="rect" draw:dots1="1" draw:dots1-length="3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0c322c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solid" draw:fill-color="#ffffff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301cm" style:print-orientation="landscape"/>
    </style:page-layout>
    <style:style style:name="Mdp1" style:family="drawing-page">
      <style:drawing-page-properties draw:background-size="border" draw:fill="solid" draw:fill-color="#0c322c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" style:family="graphic" style:parent-style-name="standard">
      <style:graphic-properties draw:stroke="solid" svg:stroke-width="0cm" svg:stroke-color="#30ba78" draw:fill="none" loext:fill-use-slide-background="false" draw:textarea-horizontal-align="justify" draw:textarea-vertical-align="middle" draw:auto-grow-height="false" draw:fit-to-size="false" style:shrink-to-fit="false" fo:padding-top="0cm" fo:padding-bottom="0cm" fo:padding-left="0cm" fo:padding-right="0cm" fo:wrap-option="wrap" loext:decorative="false"/>
    </style:style>
    <style:style style:name="Mgr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99cm" fo:min-width="8.03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99cm" fo:min-width="2.70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99cm" fo:min-width="8.03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99cm" fo:min-width="2.70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Default_20_1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Default_20_1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M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4pt" fo:letter-spacing="normal" fo:language="en" fo:country="GB" fo:font-style="normal" style:text-underline-style="none" fo:font-weight="normal" fo:background-color="transparent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c322c" loext:opacity="100%" style:text-outline="false" style:text-line-through-style="none" style:text-line-through-type="none" style:text-position="0% 100%" style:font-name="Work Sans Light1" fo:font-size="8pt" fo:letter-spacing="normal" fo:language="en" fo:country="GB" fo:font-style="normal" style:text-underline-style="none" fo:font-weight="normal" fo:background-color="transparent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c322c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5.385cm" svg:height="9.258cm" svg:x="0.012cm" svg:y="0.999cm">
        <draw:image xlink:href="Pictures/10000001000007D2000002DBAB5BFA7CBD1961C1.png" xlink:type="simple" xlink:show="embed" xlink:actuate="onLoad" draw:mime-type="image/png">
          <text:p/>
        </draw:image>
      </draw:frame>
      <draw:frame draw:style-name="Mgr3" draw:text-style-name="MP5" draw:layer="backgroundobjects" svg:width="2.476cm" svg:height="2.243cm" svg:x="22.21cm" svg:y="11.542cm">
        <draw:image xlink:href="Pictures/10001A7400000E7B00000D219A7DDC5492F216A4.emf" xlink:type="simple" xlink:show="embed" xlink:actuate="onLoad" draw:mime-type="image/x-emf">
          <text:p/>
        </draw:image>
        <draw:image xlink:href="Pictures/100000010000008B0000007EA7ADAEDC4B61CF50.png" xlink:type="simple" xlink:show="embed" xlink:actuate="onLoad" draw:mime-type="image/png"/>
      </draw:frame>
      <draw:frame draw:style-name="Mgr3" draw:text-style-name="MP5" draw:layer="backgroundobjects" svg:width="15.015cm" svg:height="2.159cm" svg:x="6.571cm" svg:y="11.707cm">
        <draw:image xlink:href="Pictures/10006B9C00005AC400000D2112E149964AD4B1FF.emf" xlink:type="simple" xlink:show="embed" xlink:actuate="onLoad" draw:mime-type="image/x-emf">
          <text:p/>
        </draw:image>
        <draw:image xlink:href="Pictures/10000001000003650000007E8E7E709B319833E1.png" xlink:type="simple" xlink:show="embed" xlink:actuate="onLoad" draw:mime-type="image/png"/>
      </draw:frame>
      <draw:frame presentation:style-name="Blank_20_Slide-title" draw:layer="backgroundobjects" svg:width="22.859cm" svg:height="2.387cm" svg:x="1.27cm" svg:y="0.57cm" presentation:class="title" presentation:placeholder="true">
        <draw:text-box/>
      </draw:frame>
      <draw:frame presentation:style-name="Blank_20_Slide-outline1" draw:layer="backgroundobjects" svg:width="22.859cm" svg:height="8.293cm" svg:x="1.27cm" svg:y="3.346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7" draw:layer="backgroundobjects" svg:width="2.703cm" svg:height="0.598cm" svg:x="1.285cm" svg:y="12.888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style-name="Mgr5" draw:text-style-name="MP8" draw:layer="backgroundobjects" svg:x1="2.402cm" svg:y1="13.1cm" svg:x2="3.402cm" svg:y2="13.101cm">
        <text:p/>
      </draw:line>
      <draw:custom-shape draw:style-name="Mgr6" draw:text-style-name="MP7" draw:layer="backgroundobjects" svg:width="8.036cm" svg:height="0.598cm" svg:x="3.8cm" svg:y="12.888cm">
        <text:p text:style-name="MP6"><text:span text:style-name="MT2">Copyright © SUSE 202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1.186cm" svg:height="0.289cm" svg:x="22.8cm" svg:y="12.948cm">
        <draw:image xlink:href="Pictures/100000010000025600000097D62DC26E35B304DB.png" xlink:type="simple" xlink:show="embed" xlink:actuate="onLoad" draw:mime-type="image/png">
          <text:p/>
        </draw:image>
      </draw:frame>
      <draw:frame presentation:style-name="Default-title" draw:layer="backgroundobjects" svg:width="22.859cm" svg:height="2.387cm" svg:x="1.27cm" svg:y="0.57cm" presentation:class="title" presentation:placeholder="true">
        <draw:text-box/>
      </draw:frame>
      <draw:frame presentation:style-name="Default-outline1" draw:layer="backgroundobjects" svg:width="22.859cm" svg:height="8.293cm" svg:x="1.27cm" svg:y="3.3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07cm" svg:height="10.476cm" svg:x="1.49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7" draw:layer="backgroundobjects" svg:width="8.036cm" svg:height="0.598cm" svg:x="3.8cm" svg:y="12.888cm">
        <text:p text:style-name="MP6"><text:span text:style-name="MT2">Copyright © SUSE 202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8" draw:text-style-name="MP7" draw:layer="backgroundobjects" svg:width="2.703cm" svg:height="0.598cm" svg:x="1.286cm" svg:y="12.888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style-name="Mgr5" draw:text-style-name="MP8" draw:layer="backgroundobjects" svg:x1="2.403cm" svg:y1="13.1cm" svg:x2="3.403cm" svg:y2="13.101cm">
        <text:p/>
      </draw:line>
      <draw:frame draw:style-name="Mgr3" draw:text-style-name="MP5" draw:layer="backgroundobjects" svg:width="1.186cm" svg:height="0.289cm" svg:x="22.8cm" svg:y="12.948cm">
        <draw:image xlink:href="Pictures/100000010000025600000097D62DC26E35B304DB.png" xlink:type="simple" xlink:show="embed" xlink:actuate="onLoad" draw:mime-type="image/png">
          <text:p/>
        </draw:image>
      </draw:frame>
      <draw:frame presentation:style-name="Default_20_1-title" draw:layer="backgroundobjects" svg:width="22.859cm" svg:height="2.387cm" svg:x="1.27cm" svg:y="0.57cm" presentation:class="title" presentation:placeholder="true">
        <draw:text-box/>
      </draw:frame>
      <draw:frame presentation:style-name="Default_20_1-outline1" draw:layer="backgroundobjects" svg:width="22.859cm" svg:height="8.293cm" svg:x="1.27cm" svg:y="3.346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07cm" svg:height="10.476cm" svg:x="1.49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.189cm" svg:height="0.293cm" svg:x="22.798cm" svg:y="12.947cm">
        <draw:image xlink:href="Pictures/100000010000025600000097D62DC26E35B304DB.png" xlink:type="simple" xlink:show="embed" xlink:actuate="onLoad" draw:mime-type="image/png">
          <text:p/>
        </draw:image>
      </draw:frame>
      <draw:frame presentation:style-name="Default_20_2-title" draw:layer="backgroundobjects" svg:width="22.859cm" svg:height="2.387cm" svg:x="1.27cm" svg:y="0.57cm" presentation:class="title" presentation:placeholder="true">
        <draw:text-box/>
      </draw:frame>
      <draw:frame presentation:style-name="Default_20_2-outline1" draw:layer="backgroundobjects" svg:width="22.859cm" svg:height="8.293cm" svg:x="1.27cm" svg:y="3.346cm" presentation:class="outline" presentation:placeholder="true">
        <draw:text-box/>
      </draw:frame>
      <draw:custom-shape draw:style-name="Mgr9" draw:text-style-name="MP7" draw:layer="backgroundobjects" svg:width="8.036cm" svg:height="0.598cm" svg:x="3.8cm" svg:y="12.888cm">
        <text:p text:style-name="MP6"><text:span text:style-name="MT2">Copyright © SUSE 202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10" draw:text-style-name="MP7" draw:layer="backgroundobjects" svg:width="2.703cm" svg:height="0.598cm" svg:x="1.286cm" svg:y="12.888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style-name="Mgr5" draw:text-style-name="MP8" draw:layer="backgroundobjects" svg:x1="2.403cm" svg:y1="13.1cm" svg:x2="3.403cm" svg:y2="13.101cm">
        <text:p/>
      </draw:line>
      <presentation:notes style:page-layout-name="PM0">
        <draw:page-thumbnail presentation:style-name="Default_20_2-title" draw:layer="backgroundobjects" svg:width="18.607cm" svg:height="10.476cm" svg:x="1.49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1" draw:text-style-name="MP7" draw:layer="backgroundobjects" svg:width="8.036cm" svg:height="0.598cm" svg:x="3.8cm" svg:y="12.888cm">
        <text:p text:style-name="MP6"><text:span text:style-name="MT2">Copyright </text:span><text:span text:style-name="MT2">© SUSE </text:span><text:span text:style-name="MT2">202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12" draw:text-style-name="MP7" draw:layer="backgroundobjects" svg:width="2.703cm" svg:height="0.598cm" svg:x="1.286cm" svg:y="12.888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style-name="Mgr5" draw:text-style-name="MP8" draw:layer="backgroundobjects" svg:x1="2.403cm" svg:y1="13.1cm" svg:x2="3.403cm" svg:y2="13.101cm">
        <text:p/>
      </draw:line>
      <draw:frame draw:style-name="Mgr3" draw:text-style-name="MP5" draw:layer="backgroundobjects" svg:width="1.186cm" svg:height="0.289cm" svg:x="22.8cm" svg:y="12.948cm">
        <draw:image xlink:href="Pictures/100000010000025600000097D62DC26E35B304DB.png" xlink:type="simple" xlink:show="embed" xlink:actuate="onLoad" draw:mime-type="image/png">
          <text:p/>
        </draw:image>
      </draw:frame>
      <draw:frame presentation:style-name="Default_20_1_5f_-title" draw:layer="backgroundobjects" svg:width="22.859cm" svg:height="2.387cm" svg:x="1.27cm" svg:y="0.57cm" presentation:class="title" presentation:placeholder="true">
        <draw:text-box/>
      </draw:frame>
      <draw:frame presentation:style-name="Default_20_1_5f_-outline1" draw:layer="backgroundobjects" svg:width="22.859cm" svg:height="8.293cm" svg:x="1.27cm" svg:y="3.346cm" presentation:class="outline" presentation:placeholder="true">
        <draw:text-box/>
      </draw:frame>
      <presentation:notes style:page-layout-name="PM0">
        <draw:page-thumbnail presentation:style-name="Default_20_1_5f_-title" draw:layer="backgroundobjects" svg:width="18.607cm" svg:height="10.476cm" svg:x="1.491cm" svg:y="2.123cm" presentation:class="page"/>
        <draw:frame presentation:style-name="Default_20_1_5f_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09T14:05:56</meta:creation-date>
    <dc:language>en-US</dc:language>
    <meta:print-date>2026-05-15T14:01:39.495207778</meta:print-date>
    <dc:date>2026-05-29T13:40:08.183079260</dc:date>
    <meta:editing-cycles>695</meta:editing-cycles>
    <dc:title>SUSECON 20</dc:title>
    <meta:editing-duration>P3DT2H15M13S</meta:editing-duration>
    <meta:generator>LibreOffice/7.6.2.1$Linux_X86_64 LibreOffice_project/60$Build-1</meta:generator>
    <meta:printed-by>PDF files</meta:printed-by>
    <meta:document-statistic meta:object-count="22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</office:meta>
</office:document-meta>
</file>